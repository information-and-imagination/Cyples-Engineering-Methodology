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CD" svg:font-family="LC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draw:fill="gradient" draw:fill-gradient-name="Gradient_5f_0" draw:shadow="hidden" loext:decorative="false"/>
    </style:style>
    <style:style style:name="gr3" style:family="graphic" style:parent-style-name="standard">
      <style:graphic-properties draw:stroke="solid" svg:stroke-width="0.025cm" svg:stroke-color="#e6e6e6" svg:stroke-opacity="100%" draw:stroke-linejoin="round" svg:stroke-linecap="round" draw:fill="none" fo:padding-top="0.137cm" fo:padding-bottom="0.137cm" fo:padding-left="0.262cm" fo:padding-right="0.262cm" loext:decorative="false"/>
    </style:style>
    <style:style style:name="gr4" style:family="graphic" style:parent-style-name="standard">
      <style:graphic-properties draw:stroke="none" draw:fill="gradient" draw:fill-gradient-name="Gradient_5f_1" draw:shadow="hidden" loext:decorative="false"/>
    </style:style>
    <style:style style:name="gr5"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loext:decorative="false"/>
    </style:style>
    <style:style style:name="gr6" style:family="graphic" style:parent-style-name="standard">
      <style:graphic-properties draw:stroke="none" draw:fill="gradient" draw:fill-gradient-name="Gradient_5f_2" draw:shadow="hidden" loext:decorative="false"/>
    </style:style>
    <style:style style:name="gr7" style:family="graphic" style:parent-style-name="standard">
      <style:graphic-properties draw:stroke="none" draw:fill="gradient" draw:fill-gradient-name="Gradient_5f_3" draw:shadow="hidden" loext:decorative="false"/>
    </style:style>
    <style:style style:name="gr8" style:family="graphic" style:parent-style-name="standard">
      <style:graphic-properties draw:stroke="solid" svg:stroke-width="0.025cm" svg:stroke-color="#cdcdcd" svg:stroke-opacity="100%" draw:stroke-linejoin="round" svg:stroke-linecap="round" draw:fill="none" fo:padding-top="0.137cm" fo:padding-bottom="0.137cm" fo:padding-left="0.262cm" fo:padding-right="0.262cm" loext:decorative="false"/>
    </style:style>
    <style:style style:name="gr9" style:family="graphic" style:parent-style-name="standard">
      <style:graphic-properties draw:stroke="none" draw:fill="gradient" draw:fill-gradient-name="Gradient_5f_4" draw:shadow="hidden" loext:decorative="false"/>
    </style:style>
    <style:style style:name="gr10" style:family="graphic" style:parent-style-name="standard">
      <style:graphic-properties draw:stroke="none" draw:fill="gradient" draw:fill-gradient-name="Gradient_5f_5" draw:shadow="hidden" loext:decorative="false"/>
    </style:style>
    <style:style style:name="gr11" style:family="graphic" style:parent-style-name="standard">
      <style:graphic-properties draw:stroke="solid" svg:stroke-width="0.008cm" svg:stroke-color="#cdcdcd" svg:stroke-opacity="100%" draw:stroke-linejoin="round" svg:stroke-linecap="round" draw:fill="none" fo:padding-top="0.129cm" fo:padding-bottom="0.129cm" fo:padding-left="0.254cm" fo:padding-right="0.254cm" loext:decorative="false"/>
    </style:style>
    <style:style style:name="gr12" style:family="graphic" style:parent-style-name="standard">
      <style:graphic-properties draw:stroke="none" draw:fill="solid" draw:fill-color="#efefef" draw:shadow="hidden" loext:decorative="false"/>
    </style:style>
    <style:style style:name="gr13" style:family="graphic" style:parent-style-name="standard">
      <style:graphic-properties draw:stroke="solid" svg:stroke-width="0.042cm" svg:stroke-color="#cdcdcd" svg:stroke-opacity="100%" draw:stroke-linejoin="round" svg:stroke-linecap="round" draw:fill="none" fo:padding-top="0.146cm" fo:padding-bottom="0.146cm" fo:padding-left="0.271cm" fo:padding-right="0.271cm" loext:decorative="false"/>
    </style:style>
    <style:style style:name="gr14" style:family="graphic" style:parent-style-name="standard">
      <style:graphic-properties draw:stroke="none" draw:fill="gradient" draw:fill-gradient-name="Gradient_5f_6" draw:shadow="hidden" loext:decorative="false"/>
    </style:style>
    <style:style style:name="gr15" style:family="graphic" style:parent-style-name="standard">
      <style:graphic-properties draw:stroke="none" draw:fill="gradient" draw:fill-gradient-name="Gradient_5f_7" draw:shadow="hidden" loext:decorative="false"/>
    </style:style>
    <style:style style:name="gr16" style:family="graphic" style:parent-style-name="standard">
      <style:graphic-properties draw:stroke="solid" svg:stroke-width="0.076cm" svg:stroke-color="#e6e6e6" svg:stroke-opacity="100%" draw:stroke-linejoin="round" svg:stroke-linecap="round" draw:fill="none" fo:padding-top="0.163cm" fo:padding-bottom="0.163cm" fo:padding-left="0.288cm" fo:padding-right="0.288cm" loext:decorative="false"/>
    </style:style>
    <style:style style:name="gr17" style:family="graphic" style:parent-style-name="standard">
      <style:graphic-properties draw:stroke="solid" svg:stroke-width="0.008cm" svg:stroke-color="#e6e6e6" svg:stroke-opacity="100%" draw:stroke-linejoin="round" svg:stroke-linecap="round" draw:fill="none" fo:padding-top="0.129cm" fo:padding-bottom="0.129cm" fo:padding-left="0.254cm" fo:padding-right="0.254cm" loext:decorative="false"/>
    </style:style>
    <style:style style:name="gr18" style:family="graphic" style:parent-style-name="standard">
      <style:graphic-properties draw:stroke="none" draw:fill="gradient" draw:fill-gradient-name="Gradient_5f_8" draw:shadow="hidden" loext:decorative="false"/>
    </style:style>
    <style:style style:name="gr19"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loext:decorative="false"/>
    </style:style>
    <style:style style:name="gr20" style:family="graphic" style:parent-style-name="standard">
      <style:graphic-properties draw:stroke="none" draw:fill="solid" draw:fill-color="#e6e6e6" draw:shadow="hidden" loext:decorative="false"/>
    </style:style>
    <style:style style:name="gr21" style:family="graphic" style:parent-style-name="standard">
      <style:graphic-properties draw:stroke="none" draw:fill="none" draw:textarea-vertical-align="middle" fo:min-height="0.508cm" fo:min-width="2.54cm" fo:padding-top="0.141cm" fo:padding-bottom="0.141cm" fo:padding-left="0.141cm" fo:padding-right="0.141cm" loext:decorative="false"/>
      <style:paragraph-properties style:writing-mode="lr-tb"/>
    </style:style>
    <style:style style:name="gr22" style:family="graphic" style:parent-style-name="standard">
      <style:graphic-properties draw:stroke="solid" svg:stroke-width="0.035cm" svg:stroke-color="#000000" svg:stroke-opacity="100%" draw:stroke-linejoin="round" svg:stroke-linecap="round" draw:fill="none" fo:padding-top="0.142cm" fo:padding-bottom="0.142cm" fo:padding-left="0.267cm" fo:padding-right="0.267cm" loext:decorative="false"/>
    </style:style>
    <style:style style:name="gr23"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loext:decorative="false"/>
    </style:style>
    <style:style style:name="gr24" style:family="graphic" style:parent-style-name="standard">
      <style:graphic-properties draw:stroke="none" draw:fill="none" draw:textarea-vertical-align="middle" fo:min-height="0.508cm" fo:min-width="2.54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middle" fo:min-height="4.126cm" fo:min-width="2.54cm" fo:padding-top="0.141cm" fo:padding-bottom="0.141cm" fo:padding-left="0.141cm" fo:padding-right="0.141cm" loext:decorative="false"/>
      <style:paragraph-properties style:writing-mode="lr-tb"/>
    </style:style>
    <style:style style:name="gr26" style:family="graphic">
      <style:graphic-properties style:writing-mode="lr-tb" loext:decorative="false"/>
    </style:style>
    <style:style style:name="gr27" style:family="graphic" style:parent-style-name="standard">
      <style:graphic-properties draw:stroke="none" draw:fill="gradient" draw:fill-gradient-name="Gradient_5f_9" draw:shadow="hidden" loext:decorative="false"/>
    </style:style>
    <style:style style:name="gr28" style:family="graphic" style:parent-style-name="standard">
      <style:graphic-properties draw:stroke="none" draw:fill="none" draw:textarea-vertical-align="middle" fo:min-height="0.381cm" fo:min-width="2.54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vertical-align="middle" fo:min-height="11.684cm" fo:min-width="2.54cm" fo:padding-top="0cm" fo:padding-bottom="0cm" fo:padding-left="0cm" fo:padding-right="0cm" loext:decorative="false"/>
      <style:paragraph-properties style:writing-mode="lr-tb"/>
    </style:style>
    <style:style style:name="gr30" style:family="graphic" style:parent-style-name="standard">
      <style:graphic-properties draw:stroke="none" draw:fill="solid" draw:fill-color="#ffffff" draw:shadow="hidden" loext:decorative="false"/>
    </style:style>
    <style:style style:name="gr31" style:family="graphic" style:parent-style-name="standard">
      <style:graphic-properties draw:stroke="none" draw:fill="none" draw:textarea-vertical-align="middle" fo:min-height="1.27cm" fo:min-width="2.54cm" fo:padding-top="0cm" fo:padding-bottom="0cm" fo:padding-left="0.141cm" fo:padding-right="0.141cm" loext:decorative="false"/>
      <style:paragraph-properties style:writing-mode="lr-tb"/>
    </style:style>
    <style:style style:name="gr32" style:family="graphic" style:parent-style-name="standard">
      <style:graphic-properties draw:stroke="none" draw:fill="solid" draw:fill-color="#ffffff" draw:shadow="visible" draw:shadow-offset-x="0.318cm" draw:shadow-offset-y="0.318cm" draw:shadow-color="#cdcdcd" draw:shadow-opacity="100%" loext:decorative="false"/>
    </style:style>
    <style:style style:name="gr33" style:family="graphic" style:parent-style-name="standard">
      <style:graphic-properties draw:stroke="none" draw:fill="none" draw:textarea-vertical-align="middle" fo:min-height="1.905cm" fo:min-width="2.54cm" fo:padding-top="0cm" fo:padding-bottom="0cm" fo:padding-left="0.141cm" fo:padding-right="0.141cm" loext:decorative="false"/>
      <style:paragraph-properties style:writing-mode="lr-tb"/>
    </style:style>
    <style:style style:name="gr34" style:family="graphic" style:parent-style-name="standard">
      <style:graphic-properties draw:stroke="none" draw:fill="none" draw:textarea-vertical-align="middle" fo:min-height="1.016cm" fo:min-width="2.54cm" fo:padding-top="0.141cm" fo:padding-bottom="0.141cm" fo:padding-left="0.141cm" fo:padding-right="0.141cm" loext:decorative="false"/>
      <style:paragraph-properties style:writing-mode="lr-tb"/>
    </style:style>
    <style:style style:name="P1" style:family="paragraph">
      <loext:graphic-properties draw:fill="gradient" draw:fill-gradient-name="Gradient_5f_0"/>
    </style:style>
    <style:style style:name="P2" style:family="paragraph">
      <loext:graphic-properties draw:fill="none"/>
    </style:style>
    <style:style style:name="P3" style:family="paragraph">
      <loext:graphic-properties draw:fill="gradient" draw:fill-gradient-name="Gradient_5f_1"/>
    </style:style>
    <style:style style:name="P4" style:family="paragraph">
      <loext:graphic-properties draw:fill="gradient" draw:fill-gradient-name="Gradient_5f_2"/>
    </style:style>
    <style:style style:name="P5" style:family="paragraph">
      <loext:graphic-properties draw:fill="gradient" draw:fill-gradient-name="Gradient_5f_3"/>
    </style:style>
    <style:style style:name="P6" style:family="paragraph">
      <loext:graphic-properties draw:fill="gradient" draw:fill-gradient-name="Gradient_5f_4"/>
    </style:style>
    <style:style style:name="P7" style:family="paragraph">
      <loext:graphic-properties draw:fill="gradient" draw:fill-gradient-name="Gradient_5f_5"/>
    </style:style>
    <style:style style:name="P8" style:family="paragraph">
      <loext:graphic-properties draw:fill="solid" draw:fill-color="#efefef"/>
    </style:style>
    <style:style style:name="P9" style:family="paragraph">
      <loext:graphic-properties draw:fill="gradient" draw:fill-gradient-name="Gradient_5f_6"/>
    </style:style>
    <style:style style:name="P10" style:family="paragraph">
      <loext:graphic-properties draw:fill="gradient" draw:fill-gradient-name="Gradient_5f_7"/>
    </style:style>
    <style:style style:name="P11" style:family="paragraph">
      <loext:graphic-properties draw:fill="gradient" draw:fill-gradient-name="Gradient_5f_8"/>
    </style:style>
    <style:style style:name="P12" style:family="paragraph">
      <loext:graphic-properties draw:fill="solid" draw:fill-color="#e6e6e6"/>
    </style:style>
    <style:style style:name="P13" style:family="paragraph">
      <style:paragraph-properties fo:margin-left="0cm" fo:margin-right="0cm" fo:margin-top="0cm" fo:margin-bottom="0cm" fo:line-height="120%" fo:text-align="center" fo:text-indent="0cm"/>
    </style:style>
    <style:style style:name="P14" style:family="paragraph">
      <style:paragraph-properties fo:margin-left="0cm" fo:margin-right="0cm" fo:margin-top="0cm" fo:margin-bottom="0cm" fo:line-height="120%" fo:text-align="left" fo:text-indent="0cm"/>
    </style:style>
    <style:style style:name="P15" style:family="paragraph">
      <style:paragraph-properties fo:margin-left="0cm" fo:margin-right="0cm" fo:margin-top="0.42cm" fo:margin-bottom="0.35cm" fo:line-height="120%" fo:text-align="center" fo:text-indent="0cm"/>
      <style:text-properties fo:font-size="10pt" style:font-size-asian="10pt" style:font-size-complex="10pt"/>
    </style:style>
    <style:style style:name="P16" style:family="paragraph">
      <loext:graphic-properties draw:fill="none"/>
      <style:paragraph-properties fo:margin-left="0cm" fo:margin-right="0cm" fo:margin-top="0cm" fo:margin-bottom="0cm" fo:line-height="120%" fo:text-align="center" fo:text-indent="0cm"/>
    </style:style>
    <style:style style:name="P17" style:family="paragraph">
      <loext:graphic-properties draw:fill="gradient" draw:fill-gradient-name="Gradient_5f_9"/>
    </style:style>
    <style:style style:name="P18" style:family="paragraph">
      <loext:graphic-properties draw:fill="solid" draw:fill-color="#ffffff"/>
    </style:style>
    <style:style style:name="T1" style:family="text">
      <style:text-properties fo:color="#000000" loext:opacity="100%" style:font-name="Arial" fo:font-size="12pt" style:font-name-asian="Arial" style:font-size-asian="12pt" style:font-name-complex="Arial" style:font-size-complex="12pt"/>
    </style:style>
    <style:style style:name="T2" style:family="text">
      <style:text-properties fo:color="#000000" loext:opacity="100%" style:font-name="Arial" fo:font-size="24pt" fo:font-weight="bold" style:font-name-asian="Arial" style:font-size-asian="24pt" style:font-weight-asian="bold" style:font-name-complex="Arial" style:font-size-complex="24pt" style:font-weight-complex="bold"/>
    </style:style>
    <style:style style:name="T3" style:family="text">
      <style:text-properties fo:color="#000000" loext:opacity="100%" style:font-name="Arial" fo:font-size="8pt" style:font-name-asian="Arial" style:font-size-asian="8pt" style:font-name-complex="Arial" style:font-size-complex="8pt"/>
    </style:style>
    <style:style style:name="T4" style:family="text">
      <style:text-properties fo:color="#00ffff" loext:opacity="100%" style:font-name="LCD" fo:font-size="18pt" style:font-name-asian="LCD" style:font-size-asian="18pt" style:font-name-complex="LCD"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line draw:style-name="gr19" draw:text-style-name="P2" draw:layer="layout" svg:x1="3.899cm" svg:y1="3.937cm" svg:x2="26.67cm" svg:y2="3.937cm">
          <text:p/>
        </draw:line>
        <draw:g draw:style-name="gr1">
          <draw:polygon draw:style-name="gr20" draw:text-style-name="P12" draw:layer="layout" svg:width="0.152cm" svg:height="0.152cm" svg:x="26.594cm" svg:y="3.937cm" svg:viewBox="0 0 153 153" draw:points="153,0 77,153 0,0">
            <text:p/>
          </draw:polygon>
          <draw:polygon draw:style-name="gr19" draw:text-style-name="P2" draw:layer="layout" svg:width="0.152cm" svg:height="0.152cm" svg:x="26.594cm" svg:y="3.937cm" svg:viewBox="0 0 153 153" draw:points="153,0 77,153 0,0">
            <text:p/>
          </draw:polygon>
        </draw:g>
        <draw:frame draw:style-name="gr21" draw:text-style-name="P2" draw:layer="layout" svg:width="5.083cm" svg:height="0.851cm" svg:x="21.587cm" svg:y="2.798cm">
          <draw:text-box>
            <text:p text:style-name="P13"><text:span text:style-name="T1">03/27/2007</text:span></text:p>
          </draw:text-box>
        </draw:frame>
        <draw:g draw:style-name="gr1">
          <draw:polygon draw:style-name="gr20" draw:text-style-name="P12" draw:layer="layout" svg:width="1.787cm" svg:height="3.038cm" svg:x="1.743cm" svg:y="1.262cm" svg:viewBox="0 0 1788 3039" draw:points="0,2467 1788,0 1572,3039">
            <text:p/>
          </draw:polygon>
          <draw:polygon draw:style-name="gr19" draw:text-style-name="P2" draw:layer="layout" svg:width="1.787cm" svg:height="3.038cm" svg:x="1.743cm" svg:y="1.262cm" svg:viewBox="0 0 1788 3039" draw:points="0,2467 1788,0 1572,3039">
            <text:p/>
          </draw:polygon>
        </draw:g>
        <draw:polygon draw:style-name="gr22" draw:text-style-name="P2" draw:layer="layout" svg:width="2.4cm" svg:height="3.429cm" svg:x="2.276cm" svg:y="1.618cm" svg:viewBox="0 0 2401 3430" draw:points="0,0 2401,1714 0,3430">
          <text:p/>
        </draw:polygon>
        <draw:polygon draw:style-name="gr23" draw:text-style-name="P2" draw:layer="layout" svg:width="1.223cm" svg:height="0.873cm" svg:x="3.17cm" svg:y="2.023cm" svg:viewBox="0 0 1224 874" draw:points="0,874 611,0 1224,874">
          <text:p/>
        </draw:polygon>
        <draw:polygon draw:style-name="gr19" draw:text-style-name="P2" draw:layer="layout" svg:width="1.897cm" svg:height="1.909cm" svg:x="1.264cm" svg:y="2.459cm" svg:viewBox="0 0 1898 1910" draw:points="0,1910 641,0 1898,1576">
          <text:p/>
        </draw:polygon>
        <draw:line draw:style-name="gr19" draw:text-style-name="P2" draw:layer="layout" svg:x1="1.27cm" svg:y1="19.495cm" svg:x2="26.67cm" svg:y2="19.495cm">
          <text:p/>
        </draw:line>
        <draw:g draw:style-name="gr1">
          <draw:polygon draw:style-name="gr20" draw:text-style-name="P12" draw:layer="layout" svg:width="0.152cm" svg:height="0.152cm" svg:x="26.594cm" svg:y="19.495cm" svg:viewBox="0 0 153 153" draw:points="0,0 153,0 77,153">
            <text:p/>
          </draw:polygon>
          <draw:polygon draw:style-name="gr19" draw:text-style-name="P2" draw:layer="layout" svg:width="0.152cm" svg:height="0.152cm" svg:x="26.594cm" svg:y="19.495cm" svg:viewBox="0 0 153 153" draw:points="0,0 153,0 77,153">
            <text:p/>
          </draw:polygon>
        </draw:g>
        <draw:frame draw:style-name="gr24" draw:text-style-name="P2" draw:layer="layout" svg:width="1.295cm" svg:height="0.569cm" svg:x="25.058cm" svg:y="19.781cm">
          <draw:text-box>
            <text:p text:style-name="P13"><text:span text:style-name="T1">page 1</text:span></text:p>
          </draw:text-box>
        </draw:frame>
        <draw:frame draw:style-name="gr25" draw:text-style-name="P16" draw:layer="layout" svg:width="17.037cm" svg:height="4.408cm" svg:x="4.87cm" svg:y="0.354cm">
          <draw:text-box>
            <text:p text:style-name="P14"><text:span text:style-name="T2">Information &amp; Imagination</text:span></text:p>
            <text:p text:style-name="P15"><text:span text:style-name="T2">Cyples Engineering Methodology (CEM) </text:span></text:p>
          </draw:text-box>
        </draw:frame>
        <draw:g draw:style-name="gr26">
          <draw:g draw:style-name="gr1">
            <draw:polygon draw:style-name="gr27" draw:text-style-name="P17" draw:layer="layout" svg:width="7.62cm" svg:height="0.381cm" svg:x="1.27cm" svg:y="19.05cm" svg:viewBox="0 0 7621 382" draw:points="0,382 7621,382 7621,0 0,0">
              <text:p/>
            </draw:polygon>
            <draw:polygon draw:style-name="gr19" draw:text-style-name="P2" draw:layer="layout" svg:width="7.62cm" svg:height="0.381cm" svg:x="1.27cm" svg:y="19.05cm" svg:viewBox="0 0 7621 382" draw:points="0,382 7621,382 7621,0 0,0">
              <text:p/>
            </draw:polygon>
          </draw:g>
          <draw:frame draw:style-name="gr28" draw:text-style-name="P2" draw:layer="layout" svg:width="7.62cm" svg:height="0.382cm" svg:x="1.27cm" svg:y="19.049cm">
            <draw:text-box>
              <text:p text:style-name="P13"><text:span text:style-name="T3">CYPMECH 001</text:span></text:p>
            </draw:text-box>
          </draw:frame>
        </draw:g>
        <draw:g draw:style-name="gr26">
          <draw:g draw:style-name="gr1">
            <draw:polygon draw:style-name="gr27" draw:text-style-name="P17" draw:layer="layout" svg:width="21.336cm" svg:height="11.684cm" svg:x="3.556cm" svg:y="5.842cm" svg:viewBox="0 0 21337 11685" draw:points="0,11685 21337,11685 21337,0 0,0">
              <text:p/>
            </draw:polygon>
            <draw:polygon draw:style-name="gr19" draw:text-style-name="P2" draw:layer="layout" svg:width="21.336cm" svg:height="11.684cm" svg:x="3.556cm" svg:y="5.842cm" svg:viewBox="0 0 21337 11685" draw:points="0,11685 21337,11685 21337,0 0,0">
              <text:p/>
            </draw:polygon>
          </draw:g>
          <draw:frame draw:style-name="gr29" draw:text-style-name="P2" draw:layer="layout" svg:width="21.336cm" svg:height="11.684cm" svg:x="3.556cm" svg:y="5.842cm">
            <draw:text-box>
              <text:p text:style-name="P15"><text:span text:style-name="T4">Example Concept Architecture </text:span></text:p>
              <text:p text:style-name="P13"><text:span text:style-name="T4"/></text:p>
              <text:p text:style-name="P13"><text:span text:style-name="T4">Purpose:</text:span></text:p>
              <text:p text:style-name="P15"><text:span text:style-name="T4">Demonstrate how a system can be decomposed into functional subsystems before implementation decisions are made. </text:span></text:p>
              <text:p text:style-name="P13"><text:span text:style-name="T4"/></text:p>
              <text:p text:style-name="P15"><text:span text:style-name="T4">This diagram demonstrates the methodology and is not intended to represent a complete design. </text:span></text:p>
            </draw:text-box>
          </draw:frame>
        </draw:g>
      </draw:page>
      <draw:page draw:name="Page-2" draw:style-name="dp1" draw:master-page-name="PM1">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g draw:style-name="gr26">
          <draw:g draw:style-name="gr1">
            <draw:polygon draw:style-name="gr30" draw:text-style-name="P18" draw:layer="layout" svg:width="2.54cm" svg:height="1.27cm" svg:x="15.875cm" svg:y="8.731cm" svg:viewBox="0 0 2541 1271" draw:points="0,1271 0,0 2541,0 2541,1271">
              <text:p/>
            </draw:polygon>
            <draw:polygon draw:style-name="gr19" draw:text-style-name="P2" draw:layer="layout" svg:width="2.54cm" svg:height="1.27cm" svg:x="15.875cm" svg:y="8.731cm" svg:viewBox="0 0 2541 1271" draw:points="0,1271 0,0 2541,0 2541,1271">
              <text:p/>
            </draw:polygon>
          </draw:g>
          <draw:frame draw:style-name="gr31" draw:text-style-name="P2" draw:layer="layout" svg:width="2.54cm" svg:height="1.27cm" svg:x="15.875cm" svg:y="8.731cm">
            <draw:text-box>
              <text:p text:style-name="P13"><text:span text:style-name="T3">Wiring Infrastructure</text:span></text:p>
            </draw:text-box>
          </draw:frame>
        </draw:g>
        <draw:g draw:style-name="gr26">
          <draw:g draw:style-name="gr1">
            <draw:polygon draw:style-name="gr30" draw:text-style-name="P18" draw:layer="layout" svg:width="2.54cm" svg:height="1.27cm" svg:x="12.383cm" svg:y="15.081cm" svg:viewBox="0 0 2541 1271" draw:points="0,1271 0,0 2541,0 2541,1271">
              <text:p/>
            </draw:polygon>
            <draw:polygon draw:style-name="gr19" draw:text-style-name="P2" draw:layer="layout" svg:width="2.54cm" svg:height="1.27cm" svg:x="12.383cm" svg:y="15.081cm" svg:viewBox="0 0 2541 1271" draw:points="0,1271 0,0 2541,0 2541,1271">
              <text:p/>
            </draw:polygon>
          </draw:g>
          <draw:frame draw:style-name="gr31" draw:text-style-name="P2" draw:layer="layout" svg:width="2.54cm" svg:height="1.27cm" svg:x="12.383cm" svg:y="15.081cm">
            <draw:text-box>
              <text:p text:style-name="P13"><text:span text:style-name="T3">Data Storage</text:span></text:p>
            </draw:text-box>
          </draw:frame>
        </draw:g>
        <draw:g draw:style-name="gr26">
          <draw:g draw:style-name="gr1">
            <draw:polygon draw:style-name="gr30" draw:text-style-name="P18" draw:layer="layout" svg:width="2.54cm" svg:height="1.27cm" svg:x="7.144cm" svg:y="8.731cm" svg:viewBox="0 0 2541 1271" draw:points="0,1271 0,0 2541,0 2541,1271">
              <text:p/>
            </draw:polygon>
            <draw:polygon draw:style-name="gr19" draw:text-style-name="P2" draw:layer="layout" svg:width="2.54cm" svg:height="1.27cm" svg:x="7.144cm" svg:y="8.731cm" svg:viewBox="0 0 2541 1271" draw:points="0,1271 0,0 2541,0 2541,1271">
              <text:p/>
            </draw:polygon>
          </draw:g>
          <draw:frame draw:style-name="gr31" draw:text-style-name="P2" draw:layer="layout" svg:width="2.54cm" svg:height="1.27cm" svg:x="7.144cm" svg:y="8.731cm">
            <draw:text-box>
              <text:p text:style-name="P13"><text:span text:style-name="T3">Program</text:span></text:p>
            </draw:text-box>
          </draw:frame>
        </draw:g>
        <draw:g draw:style-name="gr26">
          <draw:g draw:style-name="gr1">
            <draw:polygon draw:style-name="gr30" draw:text-style-name="P18" draw:layer="layout" svg:width="2.54cm" svg:height="1.27cm" svg:x="15.875cm" svg:y="15.081cm" svg:viewBox="0 0 2541 1271" draw:points="0,1271 0,0 2541,0 2541,1271">
              <text:p/>
            </draw:polygon>
            <draw:polygon draw:style-name="gr19" draw:text-style-name="P2" draw:layer="layout" svg:width="2.54cm" svg:height="1.27cm" svg:x="15.875cm" svg:y="15.081cm" svg:viewBox="0 0 2541 1271" draw:points="0,1271 0,0 2541,0 2541,1271">
              <text:p/>
            </draw:polygon>
          </draw:g>
          <draw:frame draw:style-name="gr31" draw:text-style-name="P2" draw:layer="layout" svg:width="2.54cm" svg:height="1.27cm" svg:x="15.875cm" svg:y="15.081cm">
            <draw:text-box>
              <text:p text:style-name="P13"><text:span text:style-name="T3">Motherboard</text:span></text:p>
            </draw:text-box>
          </draw:frame>
        </draw:g>
        <draw:g draw:style-name="gr26">
          <draw:g draw:style-name="gr1">
            <draw:polygon draw:style-name="gr32" draw:text-style-name="P18" draw:layer="layout" svg:width="3.81cm" svg:height="1.905cm" svg:x="13.494cm" svg:y="5.874cm" svg:viewBox="0 0 3811 1906" draw:points="0,1906 0,0 3811,0 3811,1906">
              <text:p/>
            </draw:polygon>
            <draw:path draw:style-name="gr19" draw:text-style-name="P2" draw:layer="layout" svg:width="3.81cm" svg:height="1.905cm" svg:x="13.494cm" svg:y="5.874cm" svg:viewBox="0 0 3811 1906" svg:d="M0 1906v-1906h3811v1906zM63 1842v-1779h3684v1779z">
              <text:p/>
            </draw:path>
          </draw:g>
          <draw:frame draw:style-name="gr33" draw:text-style-name="P2" draw:layer="layout" svg:width="3.81cm" svg:height="1.905cm" svg:x="13.494cm" svg:y="5.874cm">
            <draw:text-box>
              <text:p text:style-name="P13"><text:span text:style-name="T3">Main Logic Computer</text:span></text:p>
            </draw:text-box>
          </draw:frame>
        </draw:g>
        <draw:polyline draw:style-name="gr19" draw:text-style-name="P2" draw:layer="layout" svg:width="5.715cm" svg:height="1.588cm" svg:x="9.684cm" svg:y="7.779cm" svg:viewBox="0 0 5716 1589" draw:points="5716,0 5716,1589 0,1589">
          <text:p/>
        </draw:polyline>
        <draw:polyline draw:style-name="gr19" draw:text-style-name="P2" draw:layer="layout" svg:width="0.476cm" svg:height="1.588cm" svg:x="15.399cm" svg:y="7.779cm" svg:viewBox="0 0 477 1589" draw:points="0,0 0,1589 477,1589">
          <text:p/>
        </draw:polyline>
        <draw:polyline draw:style-name="gr19" draw:text-style-name="P2" draw:layer="layout" svg:width="0.476cm" svg:height="7.938cm" svg:x="14.923cm" svg:y="7.779cm" svg:viewBox="0 0 477 7939" draw:points="477,0 477,7939 0,7939">
          <text:p/>
        </draw:polyline>
        <draw:polyline draw:style-name="gr19" draw:text-style-name="P2" draw:layer="layout" svg:width="0.476cm" svg:height="7.938cm" svg:x="15.399cm" svg:y="7.779cm" svg:viewBox="0 0 477 7939" draw:points="0,0 0,7939 477,7939">
          <text:p/>
        </draw:polyline>
        <draw:line draw:style-name="gr19" draw:text-style-name="P2" draw:layer="layout" svg:x1="4.005cm" svg:y1="4.082cm" svg:x2="26.776cm" svg:y2="4.082cm">
          <text:p/>
        </draw:line>
        <draw:g draw:style-name="gr1">
          <draw:polygon draw:style-name="gr20" draw:text-style-name="P12" draw:layer="layout" svg:width="0.152cm" svg:height="0.152cm" svg:x="26.699cm" svg:y="4.082cm" svg:viewBox="0 0 153 153" draw:points="153,0 77,153 0,0">
            <text:p/>
          </draw:polygon>
          <draw:polygon draw:style-name="gr19" draw:text-style-name="P2" draw:layer="layout" svg:width="0.152cm" svg:height="0.152cm" svg:x="26.699cm" svg:y="4.082cm" svg:viewBox="0 0 153 153" draw:points="153,0 77,153 0,0">
            <text:p/>
          </draw:polygon>
        </draw:g>
        <draw:frame draw:style-name="gr21" draw:text-style-name="P2" draw:layer="layout" svg:width="5.083cm" svg:height="0.851cm" svg:x="21.693cm" svg:y="2.943cm">
          <draw:text-box>
            <text:p text:style-name="P13"><text:span text:style-name="T1">03/27/2007</text:span></text:p>
          </draw:text-box>
        </draw:frame>
        <draw:g draw:style-name="gr1">
          <draw:polygon draw:style-name="gr20" draw:text-style-name="P12" draw:layer="layout" svg:width="1.787cm" svg:height="3.038cm" svg:x="1.849cm" svg:y="1.407cm" svg:viewBox="0 0 1788 3039" draw:points="0,2467 1788,0 1572,3039">
            <text:p/>
          </draw:polygon>
          <draw:polygon draw:style-name="gr19" draw:text-style-name="P2" draw:layer="layout" svg:width="1.787cm" svg:height="3.038cm" svg:x="1.849cm" svg:y="1.407cm" svg:viewBox="0 0 1788 3039" draw:points="0,2467 1788,0 1572,3039">
            <text:p/>
          </draw:polygon>
        </draw:g>
        <draw:polygon draw:style-name="gr22" draw:text-style-name="P2" draw:layer="layout" svg:width="2.4cm" svg:height="3.429cm" svg:x="2.382cm" svg:y="1.763cm" svg:viewBox="0 0 2401 3430" draw:points="0,0 2401,1714 0,3430">
          <text:p/>
        </draw:polygon>
        <draw:polygon draw:style-name="gr23" draw:text-style-name="P2" draw:layer="layout" svg:width="1.223cm" svg:height="0.873cm" svg:x="3.276cm" svg:y="2.168cm" svg:viewBox="0 0 1224 874" draw:points="0,874 611,0 1224,874">
          <text:p/>
        </draw:polygon>
        <draw:polygon draw:style-name="gr19" draw:text-style-name="P2" draw:layer="layout" svg:width="1.897cm" svg:height="1.909cm" svg:x="1.37cm" svg:y="2.604cm" svg:viewBox="0 0 1898 1910" draw:points="0,1910 641,0 1898,1576">
          <text:p/>
        </draw:polygon>
        <draw:line draw:style-name="gr19" draw:text-style-name="P2" draw:layer="layout" svg:x1="1.376cm" svg:y1="19.639cm" svg:x2="26.776cm" svg:y2="19.639cm">
          <text:p/>
        </draw:line>
        <draw:g draw:style-name="gr1">
          <draw:polygon draw:style-name="gr20" draw:text-style-name="P12" draw:layer="layout" svg:width="0.152cm" svg:height="0.152cm" svg:x="26.699cm" svg:y="19.639cm" svg:viewBox="0 0 153 153" draw:points="0,0 153,0 77,153">
            <text:p/>
          </draw:polygon>
          <draw:polygon draw:style-name="gr19" draw:text-style-name="P2" draw:layer="layout" svg:width="0.152cm" svg:height="0.152cm" svg:x="26.699cm" svg:y="19.639cm" svg:viewBox="0 0 153 153" draw:points="0,0 153,0 77,153">
            <text:p/>
          </draw:polygon>
        </draw:g>
        <draw:frame draw:style-name="gr24" draw:text-style-name="P2" draw:layer="layout" svg:width="1.295cm" svg:height="0.569cm" svg:x="25.164cm" svg:y="19.926cm">
          <draw:text-box>
            <text:p text:style-name="P13"><text:span text:style-name="T1">page 2</text:span></text:p>
          </draw:text-box>
        </draw:frame>
        <draw:frame draw:style-name="gr34" draw:text-style-name="P2" draw:layer="layout" svg:width="10.771cm" svg:height="2.547cm" svg:x="4.976cm" svg:y="1.841cm">
          <draw:text-box>
            <text:p text:style-name="P13"><text:span text:style-name="T2">Information &amp; Imagination</text:span></text:p>
          </draw:text-box>
        </draw:frame>
        <draw:g draw:style-name="gr26">
          <draw:g draw:style-name="gr1">
            <draw:polygon draw:style-name="gr27" draw:text-style-name="P17" draw:layer="layout" svg:width="7.62cm" svg:height="0.381cm" svg:x="1.27cm" svg:y="19.177cm" svg:viewBox="0 0 7621 382" draw:points="0,382 7621,382 7621,0 0,0">
              <text:p/>
            </draw:polygon>
            <draw:polygon draw:style-name="gr19" draw:text-style-name="P2" draw:layer="layout" svg:width="7.62cm" svg:height="0.381cm" svg:x="1.27cm" svg:y="19.177cm" svg:viewBox="0 0 7621 382" draw:points="0,382 7621,382 7621,0 0,0">
              <text:p/>
            </draw:polygon>
          </draw:g>
          <draw:frame draw:style-name="gr28" draw:text-style-name="P2" draw:layer="layout" svg:width="7.62cm" svg:height="0.382cm" svg:x="1.27cm" svg:y="19.176cm">
            <draw:text-box>
              <text:p text:style-name="P13"><text:span text:style-name="T3">CYPMECH 001</text:span></text:p>
            </draw:text-box>
          </draw:frame>
        </draw:g>
        <draw:g draw:style-name="gr26">
          <draw:g draw:style-name="gr1">
            <draw:polygon draw:style-name="gr30" draw:text-style-name="P18" draw:layer="layout" svg:width="2.54cm" svg:height="1.27cm" svg:x="5.398cm" svg:y="10.954cm" svg:viewBox="0 0 2541 1271" draw:points="0,1271 0,0 2541,0 2541,1271">
              <text:p/>
            </draw:polygon>
            <draw:polygon draw:style-name="gr19" draw:text-style-name="P2" draw:layer="layout" svg:width="2.54cm" svg:height="1.27cm" svg:x="5.398cm" svg:y="10.954cm" svg:viewBox="0 0 2541 1271" draw:points="0,1271 0,0 2541,0 2541,1271">
              <text:p/>
            </draw:polygon>
          </draw:g>
          <draw:frame draw:style-name="gr31" draw:text-style-name="P2" draw:layer="layout" svg:width="2.54cm" svg:height="1.27cm" svg:x="5.398cm" svg:y="10.954cm">
            <draw:text-box>
              <text:p text:style-name="P13"><text:span text:style-name="T3">Main Operating System</text:span></text:p>
            </draw:text-box>
          </draw:frame>
        </draw:g>
        <draw:polyline draw:style-name="gr19" draw:text-style-name="P2" draw:layer="layout" svg:width="1.746cm" svg:height="0.953cm" svg:x="6.668cm" svg:y="10.001cm" svg:viewBox="0 0 1747 954" draw:points="1747,0 1747,477 0,477 0,954">
          <text:p/>
        </draw:polyline>
        <draw:g draw:style-name="gr26">
          <draw:g draw:style-name="gr1">
            <draw:polygon draw:style-name="gr30" draw:text-style-name="P18" draw:layer="layout" svg:width="2.54cm" svg:height="1.27cm" svg:x="8.89cm" svg:y="10.954cm" svg:viewBox="0 0 2541 1271" draw:points="0,1271 0,0 2541,0 2541,1271">
              <text:p/>
            </draw:polygon>
            <draw:polygon draw:style-name="gr19" draw:text-style-name="P2" draw:layer="layout" svg:width="2.54cm" svg:height="1.27cm" svg:x="8.89cm" svg:y="10.954cm" svg:viewBox="0 0 2541 1271" draw:points="0,1271 0,0 2541,0 2541,1271">
              <text:p/>
            </draw:polygon>
          </draw:g>
          <draw:frame draw:style-name="gr31" draw:text-style-name="P2" draw:layer="layout" svg:width="2.54cm" svg:height="1.27cm" svg:x="8.89cm" svg:y="10.954cm">
            <draw:text-box>
              <text:p text:style-name="P13"><text:span text:style-name="T3">Movement Logic</text:span></text:p>
            </draw:text-box>
          </draw:frame>
        </draw:g>
        <draw:polyline draw:style-name="gr19" draw:text-style-name="P2" draw:layer="layout" svg:width="1.746cm" svg:height="0.953cm" svg:x="8.414cm" svg:y="10.001cm" svg:viewBox="0 0 1747 954" draw:points="0,0 0,477 1747,477 1747,954">
          <text:p/>
        </draw:polyline>
        <draw:g draw:style-name="gr26">
          <draw:g draw:style-name="gr1">
            <draw:polygon draw:style-name="gr30" draw:text-style-name="P18" draw:layer="layout" svg:width="2.54cm" svg:height="1.27cm" svg:x="1.905cm" svg:y="10.954cm" svg:viewBox="0 0 2541 1271" draw:points="0,1271 0,0 2541,0 2541,1271">
              <text:p/>
            </draw:polygon>
            <draw:polygon draw:style-name="gr19" draw:text-style-name="P2" draw:layer="layout" svg:width="2.54cm" svg:height="1.27cm" svg:x="1.905cm" svg:y="10.954cm" svg:viewBox="0 0 2541 1271" draw:points="0,1271 0,0 2541,0 2541,1271">
              <text:p/>
            </draw:polygon>
          </draw:g>
          <draw:frame draw:style-name="gr31" draw:text-style-name="P2" draw:layer="layout" svg:width="2.54cm" svg:height="1.27cm" svg:x="1.905cm" svg:y="10.954cm">
            <draw:text-box>
              <text:p text:style-name="P13"><text:span text:style-name="T3">Input Devices Logic</text:span></text:p>
            </draw:text-box>
          </draw:frame>
        </draw:g>
        <draw:polyline draw:style-name="gr19" draw:text-style-name="P2" draw:layer="layout" svg:width="5.239cm" svg:height="0.953cm" svg:x="3.175cm" svg:y="10.001cm" svg:viewBox="0 0 5240 954" draw:points="5240,0 5240,477 0,477 0,954">
          <text:p/>
        </draw:polyline>
        <draw:g draw:style-name="gr26">
          <draw:g draw:style-name="gr1">
            <draw:polygon draw:style-name="gr30" draw:text-style-name="P18" draw:layer="layout" svg:width="2.54cm" svg:height="1.27cm" svg:x="12.383cm" svg:y="10.954cm" svg:viewBox="0 0 2541 1271" draw:points="0,1271 0,0 2541,0 2541,1271">
              <text:p/>
            </draw:polygon>
            <draw:polygon draw:style-name="gr19" draw:text-style-name="P2" draw:layer="layout" svg:width="2.54cm" svg:height="1.27cm" svg:x="12.383cm" svg:y="10.954cm" svg:viewBox="0 0 2541 1271" draw:points="0,1271 0,0 2541,0 2541,1271">
              <text:p/>
            </draw:polygon>
          </draw:g>
          <draw:frame draw:style-name="gr31" draw:text-style-name="P2" draw:layer="layout" svg:width="2.54cm" svg:height="1.27cm" svg:x="12.383cm" svg:y="10.954cm">
            <draw:text-box>
              <text:p text:style-name="P13"><text:span text:style-name="T3">Output Devices Logic</text:span></text:p>
            </draw:text-box>
          </draw:frame>
        </draw:g>
        <draw:polyline draw:style-name="gr19" draw:text-style-name="P2" draw:layer="layout" svg:width="5.239cm" svg:height="0.953cm" svg:x="8.414cm" svg:y="10.001cm" svg:viewBox="0 0 5240 954" draw:points="0,0 0,477 5240,477 5240,954">
          <text:p/>
        </draw:polyline>
        <draw:g draw:style-name="gr26">
          <draw:g draw:style-name="gr1">
            <draw:polygon draw:style-name="gr30" draw:text-style-name="P18" draw:layer="layout" svg:width="2.54cm" svg:height="1.27cm" svg:x="5.398cm" svg:y="13.176cm" svg:viewBox="0 0 2541 1271" draw:points="0,1271 0,0 2541,0 2541,1271">
              <text:p/>
            </draw:polygon>
            <draw:polygon draw:style-name="gr19" draw:text-style-name="P2" draw:layer="layout" svg:width="2.54cm" svg:height="1.27cm" svg:x="5.398cm" svg:y="13.176cm" svg:viewBox="0 0 2541 1271" draw:points="0,1271 0,0 2541,0 2541,1271">
              <text:p/>
            </draw:polygon>
          </draw:g>
          <draw:frame draw:style-name="gr31" draw:text-style-name="P2" draw:layer="layout" svg:width="2.54cm" svg:height="1.27cm" svg:x="5.398cm" svg:y="13.176cm">
            <draw:text-box>
              <text:p text:style-name="P13"><text:span text:style-name="T3">Data Collection/Reporting</text:span></text:p>
            </draw:text-box>
          </draw:frame>
        </draw:g>
        <draw:line draw:style-name="gr19" draw:text-style-name="P2" draw:layer="layout" svg:x1="6.668cm" svg:y1="12.224cm" svg:x2="6.668cm" svg:y2="13.176cm">
          <text:p/>
        </draw:line>
        <draw:g draw:style-name="gr26">
          <draw:g draw:style-name="gr1">
            <draw:polygon draw:style-name="gr30" draw:text-style-name="P18" draw:layer="layout" svg:width="2.54cm" svg:height="1.27cm" svg:x="8.89cm" svg:y="13.176cm" svg:viewBox="0 0 2541 1271" draw:points="0,1271 0,0 2541,0 2541,1271">
              <text:p/>
            </draw:polygon>
            <draw:polygon draw:style-name="gr19" draw:text-style-name="P2" draw:layer="layout" svg:width="2.54cm" svg:height="1.27cm" svg:x="8.89cm" svg:y="13.176cm" svg:viewBox="0 0 2541 1271" draw:points="0,1271 0,0 2541,0 2541,1271">
              <text:p/>
            </draw:polygon>
          </draw:g>
          <draw:frame draw:style-name="gr31" draw:text-style-name="P2" draw:layer="layout" svg:width="2.54cm" svg:height="1.27cm" svg:x="8.89cm" svg:y="13.176cm">
            <draw:text-box>
              <text:p text:style-name="P13"><text:span text:style-name="T3">Task Processor</text:span></text:p>
            </draw:text-box>
          </draw:frame>
        </draw:g>
        <draw:polyline draw:style-name="gr19" draw:text-style-name="P2" draw:layer="layout" svg:width="3.493cm" svg:height="0.953cm" svg:x="6.668cm" svg:y="12.224cm" svg:viewBox="0 0 3494 954" draw:points="0,0 0,477 3494,477 3494,954">
          <text:p/>
        </draw:polyline>
        <draw:g draw:style-name="gr26">
          <draw:g draw:style-name="gr1">
            <draw:polygon draw:style-name="gr30" draw:text-style-name="P18" draw:layer="layout" svg:width="2.54cm" svg:height="1.27cm" svg:x="15.875cm" svg:y="10.954cm" svg:viewBox="0 0 2541 1271" draw:points="0,1271 0,0 2541,0 2541,1271">
              <text:p/>
            </draw:polygon>
            <draw:polygon draw:style-name="gr19" draw:text-style-name="P2" draw:layer="layout" svg:width="2.54cm" svg:height="1.27cm" svg:x="15.875cm" svg:y="10.954cm" svg:viewBox="0 0 2541 1271" draw:points="0,1271 0,0 2541,0 2541,1271">
              <text:p/>
            </draw:polygon>
          </draw:g>
          <draw:frame draw:style-name="gr31" draw:text-style-name="P2" draw:layer="layout" svg:width="2.54cm" svg:height="1.27cm" svg:x="15.875cm" svg:y="10.954cm">
            <draw:text-box>
              <text:p text:style-name="P13"><text:span text:style-name="T3">Wire</text:span></text:p>
            </draw:text-box>
          </draw:frame>
        </draw:g>
        <draw:line draw:style-name="gr19" draw:text-style-name="P2" draw:layer="layout" svg:x1="17.145cm" svg:y1="10.001cm" svg:x2="17.145cm" svg:y2="10.953cm">
          <text:p/>
        </draw:line>
        <draw:g draw:style-name="gr26">
          <draw:g draw:style-name="gr1">
            <draw:polygon draw:style-name="gr30" draw:text-style-name="P18" draw:layer="layout" svg:width="2.54cm" svg:height="1.27cm" svg:x="19.367cm" svg:y="10.954cm" svg:viewBox="0 0 2541 1271" draw:points="0,1271 0,0 2541,0 2541,1271">
              <text:p/>
            </draw:polygon>
            <draw:polygon draw:style-name="gr19" draw:text-style-name="P2" draw:layer="layout" svg:width="2.54cm" svg:height="1.27cm" svg:x="19.367cm" svg:y="10.954cm" svg:viewBox="0 0 2541 1271" draw:points="0,1271 0,0 2541,0 2541,1271">
              <text:p/>
            </draw:polygon>
          </draw:g>
          <draw:frame draw:style-name="gr31" draw:text-style-name="P2" draw:layer="layout" svg:width="2.54cm" svg:height="1.27cm" svg:x="19.367cm" svg:y="10.954cm">
            <draw:text-box>
              <text:p text:style-name="P13"><text:span text:style-name="T3">Connectors</text:span></text:p>
            </draw:text-box>
          </draw:frame>
        </draw:g>
        <draw:polyline draw:style-name="gr19" draw:text-style-name="P2" draw:layer="layout" svg:width="3.493cm" svg:height="0.953cm" svg:x="17.145cm" svg:y="10.001cm" svg:viewBox="0 0 3494 954" draw:points="0,0 0,477 3494,477 3494,954">
          <text:p/>
        </draw:polyline>
        <draw:g draw:style-name="gr26">
          <draw:g draw:style-name="gr1">
            <draw:polygon draw:style-name="gr30" draw:text-style-name="P18" draw:layer="layout" svg:width="2.54cm" svg:height="1.27cm" svg:x="12.383cm" svg:y="17.304cm" svg:viewBox="0 0 2541 1271" draw:points="0,1271 0,0 2541,0 2541,1271">
              <text:p/>
            </draw:polygon>
            <draw:polygon draw:style-name="gr19" draw:text-style-name="P2" draw:layer="layout" svg:width="2.54cm" svg:height="1.27cm" svg:x="12.383cm" svg:y="17.304cm" svg:viewBox="0 0 2541 1271" draw:points="0,1271 0,0 2541,0 2541,1271">
              <text:p/>
            </draw:polygon>
          </draw:g>
          <draw:frame draw:style-name="gr31" draw:text-style-name="P2" draw:layer="layout" svg:width="2.54cm" svg:height="1.27cm" svg:x="12.383cm" svg:y="17.304cm">
            <draw:text-box>
              <text:p text:style-name="P13"><text:span text:style-name="T3">Large Long term</text:span></text:p>
            </draw:text-box>
          </draw:frame>
        </draw:g>
        <draw:line draw:style-name="gr19" draw:text-style-name="P2" draw:layer="layout" svg:x1="13.653cm" svg:y1="16.351cm" svg:x2="13.653cm" svg:y2="17.303cm">
          <text:p/>
        </draw:line>
      </draw:page>
      <draw:page draw:name="Page-3" draw:style-name="dp1" draw:master-page-name="PM2">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g draw:style-name="gr26">
          <draw:g draw:style-name="gr1">
            <draw:polygon draw:style-name="gr30" draw:text-style-name="P18" draw:layer="layout" svg:width="2.54cm" svg:height="1.27cm" svg:x="12.383cm" svg:y="9.049cm" svg:viewBox="0 0 2541 1271" draw:points="0,1271 0,0 2541,0 2541,1271">
              <text:p/>
            </draw:polygon>
            <draw:polygon draw:style-name="gr19" draw:text-style-name="P2" draw:layer="layout" svg:width="2.54cm" svg:height="1.27cm" svg:x="12.383cm" svg:y="9.049cm" svg:viewBox="0 0 2541 1271" draw:points="0,1271 0,0 2541,0 2541,1271">
              <text:p/>
            </draw:polygon>
          </draw:g>
          <draw:frame draw:style-name="gr31" draw:text-style-name="P2" draw:layer="layout" svg:width="2.54cm" svg:height="1.27cm" svg:x="12.383cm" svg:y="9.049cm">
            <draw:text-box>
              <text:p text:style-name="P13"><text:span text:style-name="T3">Frame</text:span></text:p>
            </draw:text-box>
          </draw:frame>
        </draw:g>
        <draw:g draw:style-name="gr26">
          <draw:g draw:style-name="gr1">
            <draw:polygon draw:style-name="gr30" draw:text-style-name="P18" draw:layer="layout" svg:width="2.54cm" svg:height="1.27cm" svg:x="7.144cm" svg:y="13.494cm" svg:viewBox="0 0 2541 1271" draw:points="0,1271 0,0 2541,0 2541,1271">
              <text:p/>
            </draw:polygon>
            <draw:polygon draw:style-name="gr19" draw:text-style-name="P2" draw:layer="layout" svg:width="2.54cm" svg:height="1.27cm" svg:x="7.144cm" svg:y="13.494cm" svg:viewBox="0 0 2541 1271" draw:points="0,1271 0,0 2541,0 2541,1271">
              <text:p/>
            </draw:polygon>
          </draw:g>
          <draw:frame draw:style-name="gr31" draw:text-style-name="P2" draw:layer="layout" svg:width="2.54cm" svg:height="1.27cm" svg:x="7.144cm" svg:y="13.494cm">
            <draw:text-box>
              <text:p text:style-name="P13"><text:span text:style-name="T3">Skin</text:span></text:p>
            </draw:text-box>
          </draw:frame>
        </draw:g>
        <draw:g draw:style-name="gr26">
          <draw:g draw:style-name="gr1">
            <draw:polygon draw:style-name="gr32" draw:text-style-name="P18" draw:layer="layout" svg:width="3.81cm" svg:height="1.905cm" svg:x="7.144cm" svg:y="6.191cm" svg:viewBox="0 0 3811 1906" draw:points="0,1906 0,0 3811,0 3811,1906">
              <text:p/>
            </draw:polygon>
            <draw:path draw:style-name="gr19" draw:text-style-name="P2" draw:layer="layout" svg:width="3.81cm" svg:height="1.905cm" svg:x="7.144cm" svg:y="6.191cm" svg:viewBox="0 0 3811 1906" svg:d="M0 1906v-1906h3811v1906zM63 1842v-1779h3684v1779z">
              <text:p/>
            </draw:path>
          </draw:g>
          <draw:frame draw:style-name="gr33" draw:text-style-name="P2" draw:layer="layout" svg:width="3.81cm" svg:height="1.905cm" svg:x="7.144cm" svg:y="6.191cm">
            <draw:text-box>
              <text:p text:style-name="P13"><text:span text:style-name="T3">Mechanical</text:span></text:p>
            </draw:text-box>
          </draw:frame>
        </draw:g>
        <draw:line draw:style-name="gr19" draw:text-style-name="P2" draw:layer="layout" svg:x1="4.005cm" svg:y1="4.082cm" svg:x2="26.776cm" svg:y2="4.082cm">
          <text:p/>
        </draw:line>
        <draw:g draw:style-name="gr1">
          <draw:polygon draw:style-name="gr20" draw:text-style-name="P12" draw:layer="layout" svg:width="0.152cm" svg:height="0.152cm" svg:x="26.699cm" svg:y="4.082cm" svg:viewBox="0 0 153 153" draw:points="153,0 77,153 0,0">
            <text:p/>
          </draw:polygon>
          <draw:polygon draw:style-name="gr19" draw:text-style-name="P2" draw:layer="layout" svg:width="0.152cm" svg:height="0.152cm" svg:x="26.699cm" svg:y="4.082cm" svg:viewBox="0 0 153 153" draw:points="153,0 77,153 0,0">
            <text:p/>
          </draw:polygon>
        </draw:g>
        <draw:frame draw:style-name="gr21" draw:text-style-name="P2" draw:layer="layout" svg:width="5.083cm" svg:height="0.851cm" svg:x="21.693cm" svg:y="2.943cm">
          <draw:text-box>
            <text:p text:style-name="P13"><text:span text:style-name="T1">03/27/2007</text:span></text:p>
          </draw:text-box>
        </draw:frame>
        <draw:g draw:style-name="gr1">
          <draw:polygon draw:style-name="gr20" draw:text-style-name="P12" draw:layer="layout" svg:width="1.787cm" svg:height="3.038cm" svg:x="1.849cm" svg:y="1.407cm" svg:viewBox="0 0 1788 3039" draw:points="0,2467 1788,0 1572,3039">
            <text:p/>
          </draw:polygon>
          <draw:polygon draw:style-name="gr19" draw:text-style-name="P2" draw:layer="layout" svg:width="1.787cm" svg:height="3.038cm" svg:x="1.849cm" svg:y="1.407cm" svg:viewBox="0 0 1788 3039" draw:points="0,2467 1788,0 1572,3039">
            <text:p/>
          </draw:polygon>
        </draw:g>
        <draw:polygon draw:style-name="gr22" draw:text-style-name="P2" draw:layer="layout" svg:width="2.4cm" svg:height="3.429cm" svg:x="2.382cm" svg:y="1.763cm" svg:viewBox="0 0 2401 3430" draw:points="0,0 2401,1714 0,3430">
          <text:p/>
        </draw:polygon>
        <draw:polygon draw:style-name="gr23" draw:text-style-name="P2" draw:layer="layout" svg:width="1.223cm" svg:height="0.873cm" svg:x="3.276cm" svg:y="2.168cm" svg:viewBox="0 0 1224 874" draw:points="0,874 611,0 1224,874">
          <text:p/>
        </draw:polygon>
        <draw:polygon draw:style-name="gr19" draw:text-style-name="P2" draw:layer="layout" svg:width="1.897cm" svg:height="1.909cm" svg:x="1.37cm" svg:y="2.604cm" svg:viewBox="0 0 1898 1910" draw:points="0,1910 641,0 1898,1576">
          <text:p/>
        </draw:polygon>
        <draw:line draw:style-name="gr19" draw:text-style-name="P2" draw:layer="layout" svg:x1="1.376cm" svg:y1="19.639cm" svg:x2="26.776cm" svg:y2="19.639cm">
          <text:p/>
        </draw:line>
        <draw:g draw:style-name="gr1">
          <draw:polygon draw:style-name="gr20" draw:text-style-name="P12" draw:layer="layout" svg:width="0.152cm" svg:height="0.152cm" svg:x="26.699cm" svg:y="19.639cm" svg:viewBox="0 0 153 153" draw:points="0,0 153,0 77,153">
            <text:p/>
          </draw:polygon>
          <draw:polygon draw:style-name="gr19" draw:text-style-name="P2" draw:layer="layout" svg:width="0.152cm" svg:height="0.152cm" svg:x="26.699cm" svg:y="19.639cm" svg:viewBox="0 0 153 153" draw:points="0,0 153,0 77,153">
            <text:p/>
          </draw:polygon>
        </draw:g>
        <draw:frame draw:style-name="gr24" draw:text-style-name="P2" draw:layer="layout" svg:width="1.295cm" svg:height="0.569cm" svg:x="25.164cm" svg:y="19.926cm">
          <draw:text-box>
            <text:p text:style-name="P13"><text:span text:style-name="T1">page 3</text:span></text:p>
          </draw:text-box>
        </draw:frame>
        <draw:frame draw:style-name="gr34" draw:text-style-name="P2" draw:layer="layout" svg:width="10.771cm" svg:height="2.547cm" svg:x="4.976cm" svg:y="1.841cm">
          <draw:text-box>
            <text:p text:style-name="P13"><text:span text:style-name="T2">Information &amp; Imagination</text:span></text:p>
          </draw:text-box>
        </draw:frame>
        <draw:g draw:style-name="gr26">
          <draw:g draw:style-name="gr1">
            <draw:polygon draw:style-name="gr27" draw:text-style-name="P17" draw:layer="layout" svg:width="7.62cm" svg:height="0.381cm" svg:x="1.27cm" svg:y="19.177cm" svg:viewBox="0 0 7621 382" draw:points="0,382 7621,382 7621,0 0,0">
              <text:p/>
            </draw:polygon>
            <draw:polygon draw:style-name="gr19" draw:text-style-name="P2" draw:layer="layout" svg:width="7.62cm" svg:height="0.381cm" svg:x="1.27cm" svg:y="19.177cm" svg:viewBox="0 0 7621 382" draw:points="0,382 7621,382 7621,0 0,0">
              <text:p/>
            </draw:polygon>
          </draw:g>
          <draw:frame draw:style-name="gr28" draw:text-style-name="P2" draw:layer="layout" svg:width="7.62cm" svg:height="0.382cm" svg:x="1.27cm" svg:y="19.176cm">
            <draw:text-box>
              <text:p text:style-name="P13"><text:span text:style-name="T3">CYPMECH 001</text:span></text:p>
            </draw:text-box>
          </draw:frame>
        </draw:g>
        <draw:g draw:style-name="gr26">
          <draw:g draw:style-name="gr1">
            <draw:polygon draw:style-name="gr30" draw:text-style-name="P18" draw:layer="layout" svg:width="2.54cm" svg:height="1.27cm" svg:x="10.636cm" svg:y="11.271cm" svg:viewBox="0 0 2541 1271" draw:points="0,1271 0,0 2541,0 2541,1271">
              <text:p/>
            </draw:polygon>
            <draw:polygon draw:style-name="gr19" draw:text-style-name="P2" draw:layer="layout" svg:width="2.54cm" svg:height="1.27cm" svg:x="10.636cm" svg:y="11.271cm" svg:viewBox="0 0 2541 1271" draw:points="0,1271 0,0 2541,0 2541,1271">
              <text:p/>
            </draw:polygon>
          </draw:g>
          <draw:frame draw:style-name="gr31" draw:text-style-name="P2" draw:layer="layout" svg:width="2.54cm" svg:height="1.27cm" svg:x="10.636cm" svg:y="11.271cm">
            <draw:text-box>
              <text:p text:style-name="P13"><text:span text:style-name="T3">Internal Device Support</text:span></text:p>
            </draw:text-box>
          </draw:frame>
        </draw:g>
        <draw:polyline draw:style-name="gr19" draw:text-style-name="P2" draw:layer="layout" svg:width="1.746cm" svg:height="0.953cm" svg:x="11.906cm" svg:y="10.319cm" svg:viewBox="0 0 1747 954" draw:points="1747,0 1747,477 0,477 0,954">
          <text:p/>
        </draw:polyline>
        <draw:g draw:style-name="gr26">
          <draw:g draw:style-name="gr1">
            <draw:polygon draw:style-name="gr30" draw:text-style-name="P18" draw:layer="layout" svg:width="2.54cm" svg:height="1.27cm" svg:x="14.129cm" svg:y="11.271cm" svg:viewBox="0 0 2541 1271" draw:points="0,1271 0,0 2541,0 2541,1271">
              <text:p/>
            </draw:polygon>
            <draw:polygon draw:style-name="gr19" draw:text-style-name="P2" draw:layer="layout" svg:width="2.54cm" svg:height="1.27cm" svg:x="14.129cm" svg:y="11.271cm" svg:viewBox="0 0 2541 1271" draw:points="0,1271 0,0 2541,0 2541,1271">
              <text:p/>
            </draw:polygon>
          </draw:g>
          <draw:frame draw:style-name="gr31" draw:text-style-name="P2" draw:layer="layout" svg:width="2.54cm" svg:height="1.27cm" svg:x="14.129cm" svg:y="11.271cm">
            <draw:text-box>
              <text:p text:style-name="P13"><text:span text:style-name="T3">Main Structure</text:span></text:p>
            </draw:text-box>
          </draw:frame>
        </draw:g>
        <draw:polyline draw:style-name="gr19" draw:text-style-name="P2" draw:layer="layout" svg:width="1.746cm" svg:height="0.953cm" svg:x="13.653cm" svg:y="10.319cm" svg:viewBox="0 0 1747 954" draw:points="0,0 0,477 1747,477 1747,954">
          <text:p/>
        </draw:polyline>
        <draw:g draw:style-name="gr26">
          <draw:g draw:style-name="gr1">
            <draw:polygon draw:style-name="gr30" draw:text-style-name="P18" draw:layer="layout" svg:width="2.54cm" svg:height="1.27cm" svg:x="7.144cm" svg:y="11.271cm" svg:viewBox="0 0 2541 1271" draw:points="0,1271 0,0 2541,0 2541,1271">
              <text:p/>
            </draw:polygon>
            <draw:polygon draw:style-name="gr19" draw:text-style-name="P2" draw:layer="layout" svg:width="2.54cm" svg:height="1.27cm" svg:x="7.144cm" svg:y="11.271cm" svg:viewBox="0 0 2541 1271" draw:points="0,1271 0,0 2541,0 2541,1271">
              <text:p/>
            </draw:polygon>
          </draw:g>
          <draw:frame draw:style-name="gr31" draw:text-style-name="P2" draw:layer="layout" svg:width="2.54cm" svg:height="1.27cm" svg:x="7.144cm" svg:y="11.271cm">
            <draw:text-box>
              <text:p text:style-name="P13"><text:span text:style-name="T3">Limb</text:span></text:p>
              <text:p text:style-name="P13"><text:span text:style-name="T3">Structure</text:span></text:p>
            </draw:text-box>
          </draw:frame>
        </draw:g>
        <draw:polyline draw:style-name="gr19" draw:text-style-name="P2" draw:layer="layout" svg:width="5.239cm" svg:height="0.953cm" svg:x="8.414cm" svg:y="10.319cm" svg:viewBox="0 0 5240 954" draw:points="5240,0 5240,477 0,477 0,954">
          <text:p/>
        </draw:polyline>
        <draw:g draw:style-name="gr26">
          <draw:g draw:style-name="gr1">
            <draw:polygon draw:style-name="gr30" draw:text-style-name="P18" draw:layer="layout" svg:width="2.54cm" svg:height="1.27cm" svg:x="17.621cm" svg:y="11.271cm" svg:viewBox="0 0 2541 1271" draw:points="0,1271 0,0 2541,0 2541,1271">
              <text:p/>
            </draw:polygon>
            <draw:polygon draw:style-name="gr19" draw:text-style-name="P2" draw:layer="layout" svg:width="2.54cm" svg:height="1.27cm" svg:x="17.621cm" svg:y="11.271cm" svg:viewBox="0 0 2541 1271" draw:points="0,1271 0,0 2541,0 2541,1271">
              <text:p/>
            </draw:polygon>
          </draw:g>
          <draw:frame draw:style-name="gr31" draw:text-style-name="P2" draw:layer="layout" svg:width="2.54cm" svg:height="1.27cm" svg:x="17.621cm" svg:y="11.271cm">
            <draw:text-box>
              <text:p text:style-name="P13"><text:span text:style-name="T3">External Support Structure</text:span></text:p>
            </draw:text-box>
          </draw:frame>
        </draw:g>
        <draw:polyline draw:style-name="gr19" draw:text-style-name="P2" draw:layer="layout" svg:width="5.239cm" svg:height="0.953cm" svg:x="13.653cm" svg:y="10.319cm" svg:viewBox="0 0 5240 954" draw:points="0,0 0,477 5240,477 5240,954">
          <text:p/>
        </draw:polyline>
        <draw:polyline draw:style-name="gr19" draw:text-style-name="P2" draw:layer="layout" svg:width="3.334cm" svg:height="1.588cm" svg:x="9.049cm" svg:y="8.096cm" svg:viewBox="0 0 3335 1589" draw:points="0,0 0,1589 3335,1589">
          <text:p/>
        </draw:polyline>
        <draw:polyline draw:style-name="gr19" draw:text-style-name="P2" draw:layer="layout" svg:width="2.381cm" svg:height="6.032cm" svg:x="6.668cm" svg:y="8.096cm" svg:viewBox="0 0 2382 6033" draw:points="2382,0 2382,476 0,476 0,6033 476,6033">
          <text:p/>
        </draw:polyline>
        <draw:g draw:style-name="gr26">
          <draw:g draw:style-name="gr1">
            <draw:polygon draw:style-name="gr30" draw:text-style-name="P18" draw:layer="layout" svg:width="2.54cm" svg:height="1.27cm" svg:x="3.651cm" svg:y="11.271cm" svg:viewBox="0 0 2541 1271" draw:points="0,1271 0,0 2541,0 2541,1271">
              <text:p/>
            </draw:polygon>
            <draw:polygon draw:style-name="gr19" draw:text-style-name="P2" draw:layer="layout" svg:width="2.54cm" svg:height="1.27cm" svg:x="3.651cm" svg:y="11.271cm" svg:viewBox="0 0 2541 1271" draw:points="0,1271 0,0 2541,0 2541,1271">
              <text:p/>
            </draw:polygon>
          </draw:g>
          <draw:frame draw:style-name="gr31" draw:text-style-name="P2" draw:layer="layout" svg:width="2.54cm" svg:height="1.27cm" svg:x="3.651cm" svg:y="11.271cm">
            <draw:text-box>
              <text:p text:style-name="P13"><text:span text:style-name="T3">Wiring Supports</text:span></text:p>
            </draw:text-box>
          </draw:frame>
        </draw:g>
        <draw:path draw:style-name="gr19" draw:text-style-name="P2" draw:layer="layout" svg:width="8.731cm" svg:height="0.953cm" svg:x="4.921cm" svg:y="10.319cm" svg:viewBox="0 0 8732 954" svg:d="M8732 0v477h-6880c0-19-5-37-14-53s-23-30-39-39-34-14-53-14c-18 0-37 5-53 14s-29 23-39 39c-9 16-14 34-14 53h-1640v477">
          <text:p/>
        </draw:path>
      </draw:page>
      <draw:page draw:name="Page-4" draw:style-name="dp1" draw:master-page-name="PM3">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g draw:style-name="gr26">
          <draw:g draw:style-name="gr1">
            <draw:polygon draw:style-name="gr30" draw:text-style-name="P18" draw:layer="layout" svg:width="2.54cm" svg:height="1.27cm" svg:x="11.113cm" svg:y="8.255cm" svg:viewBox="0 0 2541 1271" draw:points="0,1271 0,0 2541,0 2541,1271">
              <text:p/>
            </draw:polygon>
            <draw:polygon draw:style-name="gr19" draw:text-style-name="P2" draw:layer="layout" svg:width="2.54cm" svg:height="1.27cm" svg:x="11.113cm" svg:y="8.255cm" svg:viewBox="0 0 2541 1271" draw:points="0,1271 0,0 2541,0 2541,1271">
              <text:p/>
            </draw:polygon>
          </draw:g>
          <draw:frame draw:style-name="gr31" draw:text-style-name="P2" draw:layer="layout" svg:width="2.54cm" svg:height="1.27cm" svg:x="11.113cm" svg:y="8.255cm">
            <draw:text-box>
              <text:p text:style-name="P13"><text:span text:style-name="T3">Propulsion</text:span></text:p>
            </draw:text-box>
          </draw:frame>
        </draw:g>
        <draw:g draw:style-name="gr26">
          <draw:g draw:style-name="gr1">
            <draw:polygon draw:style-name="gr30" draw:text-style-name="P18" draw:layer="layout" svg:width="2.54cm" svg:height="1.27cm" svg:x="7.62cm" svg:y="8.255cm" svg:viewBox="0 0 2541 1271" draw:points="0,1271 0,0 2541,0 2541,1271">
              <text:p/>
            </draw:polygon>
            <draw:polygon draw:style-name="gr19" draw:text-style-name="P2" draw:layer="layout" svg:width="2.54cm" svg:height="1.27cm" svg:x="7.62cm" svg:y="8.255cm" svg:viewBox="0 0 2541 1271" draw:points="0,1271 0,0 2541,0 2541,1271">
              <text:p/>
            </draw:polygon>
          </draw:g>
          <draw:frame draw:style-name="gr31" draw:text-style-name="P2" draw:layer="layout" svg:width="2.54cm" svg:height="1.27cm" svg:x="7.62cm" svg:y="8.255cm">
            <draw:text-box>
              <text:p text:style-name="P13"><text:span text:style-name="T3">Manipulators</text:span></text:p>
            </draw:text-box>
          </draw:frame>
        </draw:g>
        <draw:g draw:style-name="gr26">
          <draw:g draw:style-name="gr1">
            <draw:polygon draw:style-name="gr32" draw:text-style-name="P18" draw:layer="layout" svg:width="3.81cm" svg:height="1.905cm" svg:x="12.224cm" svg:y="5.398cm" svg:viewBox="0 0 3811 1906" draw:points="0,1906 0,0 3811,0 3811,1906">
              <text:p/>
            </draw:polygon>
            <draw:path draw:style-name="gr19" draw:text-style-name="P2" draw:layer="layout" svg:width="3.81cm" svg:height="1.905cm" svg:x="12.224cm" svg:y="5.398cm" svg:viewBox="0 0 3811 1906" svg:d="M0 1906v-1906h3811v1906zM63 1842v-1779h3684v1779z">
              <text:p/>
            </draw:path>
          </draw:g>
          <draw:frame draw:style-name="gr33" draw:text-style-name="P2" draw:layer="layout" svg:width="3.81cm" svg:height="1.905cm" svg:x="12.224cm" svg:y="5.398cm">
            <draw:text-box>
              <text:p text:style-name="P13"><text:span text:style-name="T3">Output Devices</text:span></text:p>
            </draw:text-box>
          </draw:frame>
        </draw:g>
        <draw:polyline draw:style-name="gr19" draw:text-style-name="P2" draw:layer="layout" svg:width="5.239cm" svg:height="0.953cm" svg:x="8.89cm" svg:y="7.302cm" svg:viewBox="0 0 5240 954" draw:points="5240,0 5240,477 0,477 0,954">
          <text:p/>
        </draw:polyline>
        <draw:polyline draw:style-name="gr19" draw:text-style-name="P2" draw:layer="layout" svg:width="1.746cm" svg:height="0.953cm" svg:x="12.383cm" svg:y="7.302cm" svg:viewBox="0 0 1747 954" draw:points="1747,0 1747,477 0,477 0,954">
          <text:p/>
        </draw:polyline>
        <draw:g draw:style-name="gr26">
          <draw:g draw:style-name="gr1">
            <draw:polygon draw:style-name="gr30" draw:text-style-name="P18" draw:layer="layout" svg:width="2.54cm" svg:height="1.27cm" svg:x="14.605cm" svg:y="8.255cm" svg:viewBox="0 0 2541 1271" draw:points="0,1271 0,0 2541,0 2541,1271">
              <text:p/>
            </draw:polygon>
            <draw:polygon draw:style-name="gr19" draw:text-style-name="P2" draw:layer="layout" svg:width="2.54cm" svg:height="1.27cm" svg:x="14.605cm" svg:y="8.255cm" svg:viewBox="0 0 2541 1271" draw:points="0,1271 0,0 2541,0 2541,1271">
              <text:p/>
            </draw:polygon>
          </draw:g>
          <draw:frame draw:style-name="gr31" draw:text-style-name="P2" draw:layer="layout" svg:width="2.54cm" svg:height="1.27cm" svg:x="14.605cm" svg:y="8.255cm">
            <draw:text-box>
              <text:p text:style-name="P13"><text:span text:style-name="T3">Audio</text:span></text:p>
            </draw:text-box>
          </draw:frame>
        </draw:g>
        <draw:polyline draw:style-name="gr19" draw:text-style-name="P2" draw:layer="layout" svg:width="1.746cm" svg:height="0.953cm" svg:x="14.129cm" svg:y="7.302cm" svg:viewBox="0 0 1747 954" draw:points="0,0 0,477 1747,477 1747,954">
          <text:p/>
        </draw:polyline>
        <draw:g draw:style-name="gr26">
          <draw:g draw:style-name="gr1">
            <draw:polygon draw:style-name="gr30" draw:text-style-name="P18" draw:layer="layout" svg:width="2.54cm" svg:height="1.27cm" svg:x="18.097cm" svg:y="8.255cm" svg:viewBox="0 0 2541 1271" draw:points="0,1271 0,0 2541,0 2541,1271">
              <text:p/>
            </draw:polygon>
            <draw:polygon draw:style-name="gr19" draw:text-style-name="P2" draw:layer="layout" svg:width="2.54cm" svg:height="1.27cm" svg:x="18.097cm" svg:y="8.255cm" svg:viewBox="0 0 2541 1271" draw:points="0,1271 0,0 2541,0 2541,1271">
              <text:p/>
            </draw:polygon>
          </draw:g>
          <draw:frame draw:style-name="gr31" draw:text-style-name="P2" draw:layer="layout" svg:width="2.54cm" svg:height="1.27cm" svg:x="18.097cm" svg:y="8.255cm">
            <draw:text-box>
              <text:p text:style-name="P13"><text:span text:style-name="T3">Electronic</text:span></text:p>
            </draw:text-box>
          </draw:frame>
        </draw:g>
        <draw:polyline draw:style-name="gr19" draw:text-style-name="P2" draw:layer="layout" svg:width="5.239cm" svg:height="0.953cm" svg:x="14.129cm" svg:y="7.302cm" svg:viewBox="0 0 5240 954" draw:points="0,0 0,477 5240,477 5240,954">
          <text:p/>
        </draw:polyline>
        <draw:g draw:style-name="gr26">
          <draw:g draw:style-name="gr1">
            <draw:polygon draw:style-name="gr30" draw:text-style-name="P18" draw:layer="layout" svg:width="2.54cm" svg:height="1.27cm" svg:x="18.097cm" svg:y="10.477cm" svg:viewBox="0 0 2541 1271" draw:points="0,1271 0,0 2541,0 2541,1271">
              <text:p/>
            </draw:polygon>
            <draw:polygon draw:style-name="gr19" draw:text-style-name="P2" draw:layer="layout" svg:width="2.54cm" svg:height="1.27cm" svg:x="18.097cm" svg:y="10.477cm" svg:viewBox="0 0 2541 1271" draw:points="0,1271 0,0 2541,0 2541,1271">
              <text:p/>
            </draw:polygon>
          </draw:g>
          <draw:frame draw:style-name="gr31" draw:text-style-name="P2" draw:layer="layout" svg:width="2.54cm" svg:height="1.27cm" svg:x="18.097cm" svg:y="10.477cm">
            <draw:text-box>
              <text:p text:style-name="P13"><text:span text:style-name="T3">Communications</text:span></text:p>
            </draw:text-box>
          </draw:frame>
        </draw:g>
        <draw:polyline draw:style-name="gr19" draw:text-style-name="P2" draw:layer="layout" svg:width="1.746cm" svg:height="1.588cm" svg:x="17.621cm" svg:y="9.525cm" svg:viewBox="0 0 1747 1589" draw:points="1747,0 1747,477 0,477 0,1589 476,1589">
          <text:p/>
        </draw:polyline>
        <draw:g draw:style-name="gr26">
          <draw:g draw:style-name="gr1">
            <draw:polygon draw:style-name="gr30" draw:text-style-name="P18" draw:layer="layout" svg:width="2.54cm" svg:height="1.27cm" svg:x="18.097cm" svg:y="12.383cm" svg:viewBox="0 0 2541 1271" draw:points="0,1271 0,0 2541,0 2541,1271">
              <text:p/>
            </draw:polygon>
            <draw:polygon draw:style-name="gr19" draw:text-style-name="P2" draw:layer="layout" svg:width="2.54cm" svg:height="1.27cm" svg:x="18.097cm" svg:y="12.383cm" svg:viewBox="0 0 2541 1271" draw:points="0,1271 0,0 2541,0 2541,1271">
              <text:p/>
            </draw:polygon>
          </draw:g>
          <draw:frame draw:style-name="gr31" draw:text-style-name="P2" draw:layer="layout" svg:width="2.54cm" svg:height="1.27cm" svg:x="18.097cm" svg:y="12.383cm">
            <draw:text-box>
              <text:p text:style-name="P13"><text:span text:style-name="T3">Electric / Electrical Power Output</text:span></text:p>
            </draw:text-box>
          </draw:frame>
        </draw:g>
        <draw:polyline draw:style-name="gr19" draw:text-style-name="P2" draw:layer="layout" svg:width="1.746cm" svg:height="3.493cm" svg:x="17.621cm" svg:y="9.525cm" svg:viewBox="0 0 1747 3494" draw:points="1747,0 1747,476 0,476 0,3494 476,3494">
          <text:p/>
        </draw:polyline>
        <draw:line draw:style-name="gr19" draw:text-style-name="P2" draw:layer="layout" svg:x1="4.005cm" svg:y1="4.082cm" svg:x2="26.776cm" svg:y2="4.082cm">
          <text:p/>
        </draw:line>
        <draw:g draw:style-name="gr1">
          <draw:polygon draw:style-name="gr20" draw:text-style-name="P12" draw:layer="layout" svg:width="0.152cm" svg:height="0.152cm" svg:x="26.699cm" svg:y="4.082cm" svg:viewBox="0 0 153 153" draw:points="153,0 77,153 0,0">
            <text:p/>
          </draw:polygon>
          <draw:polygon draw:style-name="gr19" draw:text-style-name="P2" draw:layer="layout" svg:width="0.152cm" svg:height="0.152cm" svg:x="26.699cm" svg:y="4.082cm" svg:viewBox="0 0 153 153" draw:points="153,0 77,153 0,0">
            <text:p/>
          </draw:polygon>
        </draw:g>
        <draw:frame draw:style-name="gr21" draw:text-style-name="P2" draw:layer="layout" svg:width="5.083cm" svg:height="0.851cm" svg:x="21.693cm" svg:y="2.943cm">
          <draw:text-box>
            <text:p text:style-name="P13"><text:span text:style-name="T1">03/27/2007</text:span></text:p>
          </draw:text-box>
        </draw:frame>
        <draw:g draw:style-name="gr1">
          <draw:polygon draw:style-name="gr20" draw:text-style-name="P12" draw:layer="layout" svg:width="1.787cm" svg:height="3.038cm" svg:x="1.849cm" svg:y="1.407cm" svg:viewBox="0 0 1788 3039" draw:points="0,2467 1788,0 1572,3039">
            <text:p/>
          </draw:polygon>
          <draw:polygon draw:style-name="gr19" draw:text-style-name="P2" draw:layer="layout" svg:width="1.787cm" svg:height="3.038cm" svg:x="1.849cm" svg:y="1.407cm" svg:viewBox="0 0 1788 3039" draw:points="0,2467 1788,0 1572,3039">
            <text:p/>
          </draw:polygon>
        </draw:g>
        <draw:polygon draw:style-name="gr22" draw:text-style-name="P2" draw:layer="layout" svg:width="2.4cm" svg:height="3.429cm" svg:x="2.382cm" svg:y="1.763cm" svg:viewBox="0 0 2401 3430" draw:points="0,0 2401,1714 0,3430">
          <text:p/>
        </draw:polygon>
        <draw:polygon draw:style-name="gr23" draw:text-style-name="P2" draw:layer="layout" svg:width="1.223cm" svg:height="0.873cm" svg:x="3.276cm" svg:y="2.168cm" svg:viewBox="0 0 1224 874" draw:points="0,874 611,0 1224,874">
          <text:p/>
        </draw:polygon>
        <draw:polygon draw:style-name="gr19" draw:text-style-name="P2" draw:layer="layout" svg:width="1.897cm" svg:height="1.909cm" svg:x="1.37cm" svg:y="2.604cm" svg:viewBox="0 0 1898 1910" draw:points="0,1910 641,0 1898,1576">
          <text:p/>
        </draw:polygon>
        <draw:line draw:style-name="gr19" draw:text-style-name="P2" draw:layer="layout" svg:x1="1.376cm" svg:y1="19.639cm" svg:x2="26.776cm" svg:y2="19.639cm">
          <text:p/>
        </draw:line>
        <draw:g draw:style-name="gr1">
          <draw:polygon draw:style-name="gr20" draw:text-style-name="P12" draw:layer="layout" svg:width="0.152cm" svg:height="0.152cm" svg:x="26.699cm" svg:y="19.639cm" svg:viewBox="0 0 153 153" draw:points="0,0 153,0 77,153">
            <text:p/>
          </draw:polygon>
          <draw:polygon draw:style-name="gr19" draw:text-style-name="P2" draw:layer="layout" svg:width="0.152cm" svg:height="0.152cm" svg:x="26.699cm" svg:y="19.639cm" svg:viewBox="0 0 153 153" draw:points="0,0 153,0 77,153">
            <text:p/>
          </draw:polygon>
        </draw:g>
        <draw:frame draw:style-name="gr24" draw:text-style-name="P2" draw:layer="layout" svg:width="1.295cm" svg:height="0.569cm" svg:x="25.164cm" svg:y="19.926cm">
          <draw:text-box>
            <text:p text:style-name="P13"><text:span text:style-name="T1">page 4</text:span></text:p>
          </draw:text-box>
        </draw:frame>
        <draw:frame draw:style-name="gr34" draw:text-style-name="P2" draw:layer="layout" svg:width="10.771cm" svg:height="2.547cm" svg:x="4.976cm" svg:y="1.841cm">
          <draw:text-box>
            <text:p text:style-name="P13"><text:span text:style-name="T2">Information &amp; Imagination</text:span></text:p>
          </draw:text-box>
        </draw:frame>
        <draw:g draw:style-name="gr26">
          <draw:g draw:style-name="gr1">
            <draw:polygon draw:style-name="gr27" draw:text-style-name="P17" draw:layer="layout" svg:width="7.62cm" svg:height="0.381cm" svg:x="1.27cm" svg:y="19.177cm" svg:viewBox="0 0 7621 382" draw:points="0,382 7621,382 7621,0 0,0">
              <text:p/>
            </draw:polygon>
            <draw:polygon draw:style-name="gr19" draw:text-style-name="P2" draw:layer="layout" svg:width="7.62cm" svg:height="0.381cm" svg:x="1.27cm" svg:y="19.177cm" svg:viewBox="0 0 7621 382" draw:points="0,382 7621,382 7621,0 0,0">
              <text:p/>
            </draw:polygon>
          </draw:g>
          <draw:frame draw:style-name="gr28" draw:text-style-name="P2" draw:layer="layout" svg:width="7.62cm" svg:height="0.382cm" svg:x="1.27cm" svg:y="19.176cm">
            <draw:text-box>
              <text:p text:style-name="P13"><text:span text:style-name="T3">CYPMECH 001</text:span></text:p>
            </draw:text-box>
          </draw:frame>
        </draw:g>
      </draw:page>
      <draw:page draw:name="Page-5" draw:style-name="dp1" draw:master-page-name="PM4">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g draw:style-name="gr26">
          <draw:g draw:style-name="gr1">
            <draw:polygon draw:style-name="gr32" draw:text-style-name="P18" draw:layer="layout" svg:width="3.81cm" svg:height="1.905cm" svg:x="10.16cm" svg:y="5.715cm" svg:viewBox="0 0 3811 1906" draw:points="0,1906 0,0 3811,0 3811,1906">
              <text:p/>
            </draw:polygon>
            <draw:path draw:style-name="gr19" draw:text-style-name="P2" draw:layer="layout" svg:width="3.81cm" svg:height="1.905cm" svg:x="10.16cm" svg:y="5.715cm" svg:viewBox="0 0 3811 1906" svg:d="M0 1906v-1906h3811v1906zM63 1842v-1779h3684v1779z">
              <text:p/>
            </draw:path>
          </draw:g>
          <draw:frame draw:style-name="gr33" draw:text-style-name="P2" draw:layer="layout" svg:width="3.81cm" svg:height="1.905cm" svg:x="10.16cm" svg:y="5.715cm">
            <draw:text-box>
              <text:p text:style-name="P13"><text:span text:style-name="T3">Power Supply</text:span></text:p>
            </draw:text-box>
          </draw:frame>
        </draw:g>
        <draw:g draw:style-name="gr26">
          <draw:g draw:style-name="gr1">
            <draw:polygon draw:style-name="gr30" draw:text-style-name="P18" draw:layer="layout" svg:width="2.54cm" svg:height="1.27cm" svg:x="9.049cm" svg:y="8.572cm" svg:viewBox="0 0 2541 1271" draw:points="0,1271 0,0 2541,0 2541,1271">
              <text:p/>
            </draw:polygon>
            <draw:polygon draw:style-name="gr19" draw:text-style-name="P2" draw:layer="layout" svg:width="2.54cm" svg:height="1.27cm" svg:x="9.049cm" svg:y="8.572cm" svg:viewBox="0 0 2541 1271" draw:points="0,1271 0,0 2541,0 2541,1271">
              <text:p/>
            </draw:polygon>
          </draw:g>
          <draw:frame draw:style-name="gr31" draw:text-style-name="P2" draw:layer="layout" svg:width="2.54cm" svg:height="1.27cm" svg:x="9.049cm" svg:y="8.572cm">
            <draw:text-box>
              <text:p text:style-name="P13"><text:span text:style-name="T3">Supply Infrastructure</text:span></text:p>
            </draw:text-box>
          </draw:frame>
        </draw:g>
        <draw:polyline draw:style-name="gr19" draw:text-style-name="P2" draw:layer="layout" svg:width="1.746cm" svg:height="0.953cm" svg:x="10.319cm" svg:y="7.62cm" svg:viewBox="0 0 1747 954" draw:points="1747,0 1747,477 0,477 0,954">
          <text:p/>
        </draw:polyline>
        <draw:g draw:style-name="gr26">
          <draw:g draw:style-name="gr1">
            <draw:polygon draw:style-name="gr30" draw:text-style-name="P18" draw:layer="layout" svg:width="2.54cm" svg:height="1.27cm" svg:x="17.304cm" svg:y="10.795cm" svg:viewBox="0 0 2541 1271" draw:points="0,1271 0,0 2541,0 2541,1271">
              <text:p/>
            </draw:polygon>
            <draw:polygon draw:style-name="gr19" draw:text-style-name="P2" draw:layer="layout" svg:width="2.54cm" svg:height="1.27cm" svg:x="17.304cm" svg:y="10.795cm" svg:viewBox="0 0 2541 1271" draw:points="0,1271 0,0 2541,0 2541,1271">
              <text:p/>
            </draw:polygon>
          </draw:g>
          <draw:frame draw:style-name="gr31" draw:text-style-name="P2" draw:layer="layout" svg:width="2.54cm" svg:height="1.27cm" svg:x="17.304cm" svg:y="10.795cm">
            <draw:text-box>
              <text:p text:style-name="P13"><text:span text:style-name="T3">Recharging Infrastructure</text:span></text:p>
            </draw:text-box>
          </draw:frame>
        </draw:g>
        <draw:polyline draw:style-name="gr19" draw:text-style-name="P2" draw:layer="layout" svg:width="6.509cm" svg:height="3.175cm" svg:x="12.065cm" svg:y="7.62cm" svg:viewBox="0 0 6510 3176" draw:points="0,0 0,2382 6510,2382 6510,3176">
          <text:p/>
        </draw:polyline>
        <draw:line draw:style-name="gr19" draw:text-style-name="P2" draw:layer="layout" svg:x1="4.005cm" svg:y1="4.082cm" svg:x2="26.776cm" svg:y2="4.082cm">
          <text:p/>
        </draw:line>
        <draw:g draw:style-name="gr1">
          <draw:polygon draw:style-name="gr20" draw:text-style-name="P12" draw:layer="layout" svg:width="0.152cm" svg:height="0.152cm" svg:x="26.699cm" svg:y="4.082cm" svg:viewBox="0 0 153 153" draw:points="153,0 77,153 0,0">
            <text:p/>
          </draw:polygon>
          <draw:polygon draw:style-name="gr19" draw:text-style-name="P2" draw:layer="layout" svg:width="0.152cm" svg:height="0.152cm" svg:x="26.699cm" svg:y="4.082cm" svg:viewBox="0 0 153 153" draw:points="153,0 77,153 0,0">
            <text:p/>
          </draw:polygon>
        </draw:g>
        <draw:frame draw:style-name="gr21" draw:text-style-name="P2" draw:layer="layout" svg:width="5.083cm" svg:height="0.851cm" svg:x="21.693cm" svg:y="2.943cm">
          <draw:text-box>
            <text:p text:style-name="P13"><text:span text:style-name="T1">03/27/2007</text:span></text:p>
          </draw:text-box>
        </draw:frame>
        <draw:g draw:style-name="gr1">
          <draw:polygon draw:style-name="gr20" draw:text-style-name="P12" draw:layer="layout" svg:width="1.787cm" svg:height="3.038cm" svg:x="1.849cm" svg:y="1.407cm" svg:viewBox="0 0 1788 3039" draw:points="0,2467 1788,0 1572,3039">
            <text:p/>
          </draw:polygon>
          <draw:polygon draw:style-name="gr19" draw:text-style-name="P2" draw:layer="layout" svg:width="1.787cm" svg:height="3.038cm" svg:x="1.849cm" svg:y="1.407cm" svg:viewBox="0 0 1788 3039" draw:points="0,2467 1788,0 1572,3039">
            <text:p/>
          </draw:polygon>
        </draw:g>
        <draw:polygon draw:style-name="gr22" draw:text-style-name="P2" draw:layer="layout" svg:width="2.4cm" svg:height="3.429cm" svg:x="2.382cm" svg:y="1.763cm" svg:viewBox="0 0 2401 3430" draw:points="0,0 2401,1714 0,3430">
          <text:p/>
        </draw:polygon>
        <draw:polygon draw:style-name="gr23" draw:text-style-name="P2" draw:layer="layout" svg:width="1.223cm" svg:height="0.873cm" svg:x="3.276cm" svg:y="2.168cm" svg:viewBox="0 0 1224 874" draw:points="0,874 611,0 1224,874">
          <text:p/>
        </draw:polygon>
        <draw:polygon draw:style-name="gr19" draw:text-style-name="P2" draw:layer="layout" svg:width="1.897cm" svg:height="1.909cm" svg:x="1.37cm" svg:y="2.604cm" svg:viewBox="0 0 1898 1910" draw:points="0,1910 641,0 1898,1576">
          <text:p/>
        </draw:polygon>
        <draw:line draw:style-name="gr19" draw:text-style-name="P2" draw:layer="layout" svg:x1="1.376cm" svg:y1="19.639cm" svg:x2="26.776cm" svg:y2="19.639cm">
          <text:p/>
        </draw:line>
        <draw:g draw:style-name="gr1">
          <draw:polygon draw:style-name="gr20" draw:text-style-name="P12" draw:layer="layout" svg:width="0.152cm" svg:height="0.152cm" svg:x="26.699cm" svg:y="19.639cm" svg:viewBox="0 0 153 153" draw:points="0,0 153,0 77,153">
            <text:p/>
          </draw:polygon>
          <draw:polygon draw:style-name="gr19" draw:text-style-name="P2" draw:layer="layout" svg:width="0.152cm" svg:height="0.152cm" svg:x="26.699cm" svg:y="19.639cm" svg:viewBox="0 0 153 153" draw:points="0,0 153,0 77,153">
            <text:p/>
          </draw:polygon>
        </draw:g>
        <draw:frame draw:style-name="gr24" draw:text-style-name="P2" draw:layer="layout" svg:width="1.295cm" svg:height="0.569cm" svg:x="25.164cm" svg:y="19.926cm">
          <draw:text-box>
            <text:p text:style-name="P13"><text:span text:style-name="T1">page 5</text:span></text:p>
          </draw:text-box>
        </draw:frame>
        <draw:frame draw:style-name="gr34" draw:text-style-name="P2" draw:layer="layout" svg:width="10.771cm" svg:height="2.547cm" svg:x="4.976cm" svg:y="1.841cm">
          <draw:text-box>
            <text:p text:style-name="P13"><text:span text:style-name="T2">Information &amp; Imagination</text:span></text:p>
          </draw:text-box>
        </draw:frame>
        <draw:g draw:style-name="gr26">
          <draw:g draw:style-name="gr1">
            <draw:polygon draw:style-name="gr27" draw:text-style-name="P17" draw:layer="layout" svg:width="7.62cm" svg:height="0.381cm" svg:x="1.27cm" svg:y="19.177cm" svg:viewBox="0 0 7621 382" draw:points="0,382 7621,382 7621,0 0,0">
              <text:p/>
            </draw:polygon>
            <draw:polygon draw:style-name="gr19" draw:text-style-name="P2" draw:layer="layout" svg:width="7.62cm" svg:height="0.381cm" svg:x="1.27cm" svg:y="19.177cm" svg:viewBox="0 0 7621 382" draw:points="0,382 7621,382 7621,0 0,0">
              <text:p/>
            </draw:polygon>
          </draw:g>
          <draw:frame draw:style-name="gr28" draw:text-style-name="P2" draw:layer="layout" svg:width="7.62cm" svg:height="0.382cm" svg:x="1.27cm" svg:y="19.176cm">
            <draw:text-box>
              <text:p text:style-name="P13"><text:span text:style-name="T3">CYPMECH 001</text:span></text:p>
            </draw:text-box>
          </draw:frame>
        </draw:g>
        <draw:g draw:style-name="gr26">
          <draw:g draw:style-name="gr1">
            <draw:polygon draw:style-name="gr30" draw:text-style-name="P18" draw:layer="layout" svg:width="2.54cm" svg:height="1.27cm" svg:x="9.049cm" svg:y="10.795cm" svg:viewBox="0 0 2541 1271" draw:points="0,1271 0,0 2541,0 2541,1271">
              <text:p/>
            </draw:polygon>
            <draw:polygon draw:style-name="gr19" draw:text-style-name="P2" draw:layer="layout" svg:width="2.54cm" svg:height="1.27cm" svg:x="9.049cm" svg:y="10.795cm" svg:viewBox="0 0 2541 1271" draw:points="0,1271 0,0 2541,0 2541,1271">
              <text:p/>
            </draw:polygon>
          </draw:g>
          <draw:frame draw:style-name="gr31" draw:text-style-name="P2" draw:layer="layout" svg:width="2.54cm" svg:height="1.27cm" svg:x="9.049cm" svg:y="10.795cm">
            <draw:text-box>
              <text:p text:style-name="P13"><text:span text:style-name="T3">Battery </text:span></text:p>
              <text:p text:style-name="P13"><text:span text:style-name="T3">Source</text:span></text:p>
            </draw:text-box>
          </draw:frame>
        </draw:g>
        <draw:line draw:style-name="gr19" draw:text-style-name="P2" draw:layer="layout" svg:x1="10.319cm" svg:y1="9.842cm" svg:x2="10.319cm" svg:y2="10.794cm">
          <text:p/>
        </draw:line>
        <draw:g draw:style-name="gr26">
          <draw:g draw:style-name="gr1">
            <draw:polygon draw:style-name="gr30" draw:text-style-name="P18" draw:layer="layout" svg:width="2.54cm" svg:height="1.27cm" svg:x="12.541cm" svg:y="10.795cm" svg:viewBox="0 0 2541 1271" draw:points="0,1271 0,0 2541,0 2541,1271">
              <text:p/>
            </draw:polygon>
            <draw:polygon draw:style-name="gr19" draw:text-style-name="P2" draw:layer="layout" svg:width="2.54cm" svg:height="1.27cm" svg:x="12.541cm" svg:y="10.795cm" svg:viewBox="0 0 2541 1271" draw:points="0,1271 0,0 2541,0 2541,1271">
              <text:p/>
            </draw:polygon>
          </draw:g>
          <draw:frame draw:style-name="gr31" draw:text-style-name="P2" draw:layer="layout" svg:width="2.54cm" svg:height="1.27cm" svg:x="12.541cm" svg:y="10.795cm">
            <draw:text-box>
              <text:p text:style-name="P13"><text:span text:style-name="T3">Wiring</text:span></text:p>
            </draw:text-box>
          </draw:frame>
        </draw:g>
        <draw:polyline draw:style-name="gr19" draw:text-style-name="P2" draw:layer="layout" svg:width="3.493cm" svg:height="0.953cm" svg:x="10.319cm" svg:y="9.842cm" svg:viewBox="0 0 3494 954" draw:points="0,0 0,477 3494,477 3494,954">
          <text:p/>
        </draw:polyline>
        <draw:g draw:style-name="gr26">
          <draw:g draw:style-name="gr1">
            <draw:polygon draw:style-name="gr30" draw:text-style-name="P18" draw:layer="layout" svg:width="2.54cm" svg:height="1.27cm" svg:x="17.304cm" svg:y="13.017cm" svg:viewBox="0 0 2541 1271" draw:points="0,1271 0,0 2541,0 2541,1271">
              <text:p/>
            </draw:polygon>
            <draw:polygon draw:style-name="gr19" draw:text-style-name="P2" draw:layer="layout" svg:width="2.54cm" svg:height="1.27cm" svg:x="17.304cm" svg:y="13.017cm" svg:viewBox="0 0 2541 1271" draw:points="0,1271 0,0 2541,0 2541,1271">
              <text:p/>
            </draw:polygon>
          </draw:g>
          <draw:frame draw:style-name="gr31" draw:text-style-name="P2" draw:layer="layout" svg:width="2.54cm" svg:height="1.27cm" svg:x="17.304cm" svg:y="13.017cm">
            <draw:text-box>
              <text:p text:style-name="P13"><text:span text:style-name="T3">Wiring</text:span></text:p>
            </draw:text-box>
          </draw:frame>
        </draw:g>
        <draw:line draw:style-name="gr19" draw:text-style-name="P2" draw:layer="layout" svg:x1="18.574cm" svg:y1="12.065cm" svg:x2="18.574cm" svg:y2="13.017cm">
          <text:p/>
        </draw:line>
        <draw:g draw:style-name="gr26">
          <draw:g draw:style-name="gr1">
            <draw:polygon draw:style-name="gr30" draw:text-style-name="P18" draw:layer="layout" svg:width="2.54cm" svg:height="1.27cm" svg:x="20.796cm" svg:y="13.017cm" svg:viewBox="0 0 2541 1271" draw:points="0,1271 0,0 2541,0 2541,1271">
              <text:p/>
            </draw:polygon>
            <draw:polygon draw:style-name="gr19" draw:text-style-name="P2" draw:layer="layout" svg:width="2.54cm" svg:height="1.27cm" svg:x="20.796cm" svg:y="13.017cm" svg:viewBox="0 0 2541 1271" draw:points="0,1271 0,0 2541,0 2541,1271">
              <text:p/>
            </draw:polygon>
          </draw:g>
          <draw:frame draw:style-name="gr31" draw:text-style-name="P2" draw:layer="layout" svg:width="2.54cm" svg:height="1.27cm" svg:x="20.796cm" svg:y="13.017cm">
            <draw:text-box>
              <text:p text:style-name="P13"><text:span text:style-name="T3">Recharging</text:span></text:p>
              <text:p text:style-name="P13"><text:span text:style-name="T3">Controller</text:span></text:p>
            </draw:text-box>
          </draw:frame>
        </draw:g>
        <draw:polyline draw:style-name="gr19" draw:text-style-name="P2" draw:layer="layout" svg:width="3.493cm" svg:height="0.953cm" svg:x="18.574cm" svg:y="12.065cm" svg:viewBox="0 0 3494 954" draw:points="0,0 0,477 3494,477 3494,954">
          <text:p/>
        </draw:polyline>
        <draw:g draw:style-name="gr26">
          <draw:g draw:style-name="gr1">
            <draw:polygon draw:style-name="gr30" draw:text-style-name="P18" draw:layer="layout" svg:width="2.54cm" svg:height="1.27cm" svg:x="5.556cm" svg:y="10.795cm" svg:viewBox="0 0 2541 1271" draw:points="0,1271 0,0 2541,0 2541,1271">
              <text:p/>
            </draw:polygon>
            <draw:polygon draw:style-name="gr19" draw:text-style-name="P2" draw:layer="layout" svg:width="2.54cm" svg:height="1.27cm" svg:x="5.556cm" svg:y="10.795cm" svg:viewBox="0 0 2541 1271" draw:points="0,1271 0,0 2541,0 2541,1271">
              <text:p/>
            </draw:polygon>
          </draw:g>
          <draw:frame draw:style-name="gr31" draw:text-style-name="P2" draw:layer="layout" svg:width="2.54cm" svg:height="1.27cm" svg:x="5.556cm" svg:y="10.795cm">
            <draw:text-box>
              <text:p text:style-name="P13"><text:span text:style-name="T3">Supply Logic</text:span></text:p>
            </draw:text-box>
          </draw:frame>
        </draw:g>
        <draw:polyline draw:style-name="gr19" draw:text-style-name="P2" draw:layer="layout" svg:width="3.493cm" svg:height="0.953cm" svg:x="6.826cm" svg:y="9.842cm" svg:viewBox="0 0 3494 954" draw:points="3494,0 3494,477 0,477 0,954">
          <text:p/>
        </draw:polyline>
        <draw:g draw:style-name="gr26">
          <draw:g draw:style-name="gr1">
            <draw:polygon draw:style-name="gr30" draw:text-style-name="P18" draw:layer="layout" svg:width="2.54cm" svg:height="1.27cm" svg:x="13.811cm" svg:y="13.017cm" svg:viewBox="0 0 2541 1271" draw:points="0,1271 0,0 2541,0 2541,1271">
              <text:p/>
            </draw:polygon>
            <draw:polygon draw:style-name="gr19" draw:text-style-name="P2" draw:layer="layout" svg:width="2.54cm" svg:height="1.27cm" svg:x="13.811cm" svg:y="13.017cm" svg:viewBox="0 0 2541 1271" draw:points="0,1271 0,0 2541,0 2541,1271">
              <text:p/>
            </draw:polygon>
          </draw:g>
          <draw:frame draw:style-name="gr31" draw:text-style-name="P2" draw:layer="layout" svg:width="2.54cm" svg:height="1.27cm" svg:x="13.811cm" svg:y="13.017cm">
            <draw:text-box>
              <text:p text:style-name="P13"><text:span text:style-name="T3">Supply Logic</text:span></text:p>
            </draw:text-box>
          </draw:frame>
        </draw:g>
        <draw:polyline draw:style-name="gr19" draw:text-style-name="P2" draw:layer="layout" svg:width="3.493cm" svg:height="0.953cm" svg:x="15.081cm" svg:y="12.065cm" svg:viewBox="0 0 3494 954" draw:points="3494,0 3494,477 0,477 0,954">
          <text:p/>
        </draw:polyline>
      </draw:page>
      <draw:page draw:name="Page-6" draw:style-name="dp1" draw:master-page-name="PM5">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g draw:style-name="gr26">
          <draw:g draw:style-name="gr1">
            <draw:polygon draw:style-name="gr32" draw:text-style-name="P18" draw:layer="layout" svg:width="3.81cm" svg:height="1.905cm" svg:x="11.906cm" svg:y="4.921cm" svg:viewBox="0 0 3811 1906" draw:points="0,1906 0,0 3811,0 3811,1906">
              <text:p/>
            </draw:polygon>
            <draw:path draw:style-name="gr19" draw:text-style-name="P2" draw:layer="layout" svg:width="3.81cm" svg:height="1.905cm" svg:x="11.906cm" svg:y="4.921cm" svg:viewBox="0 0 3811 1906" svg:d="M0 1906v-1906h3811v1906zM63 1842v-1779h3684v1779z">
              <text:p/>
            </draw:path>
          </draw:g>
          <draw:frame draw:style-name="gr33" draw:text-style-name="P2" draw:layer="layout" svg:width="3.81cm" svg:height="1.905cm" svg:x="11.906cm" svg:y="4.921cm">
            <draw:text-box>
              <text:p text:style-name="P13"><text:span text:style-name="T3">Sensor Inputs</text:span></text:p>
            </draw:text-box>
          </draw:frame>
        </draw:g>
        <draw:g draw:style-name="gr26">
          <draw:g draw:style-name="gr1">
            <draw:polygon draw:style-name="gr30" draw:text-style-name="P18" draw:layer="layout" svg:width="2.54cm" svg:height="1.27cm" svg:x="5.398cm" svg:y="7.779cm" svg:viewBox="0 0 2541 1271" draw:points="0,1271 0,0 2541,0 2541,1271">
              <text:p/>
            </draw:polygon>
            <draw:polygon draw:style-name="gr19" draw:text-style-name="P2" draw:layer="layout" svg:width="2.54cm" svg:height="1.27cm" svg:x="5.398cm" svg:y="7.779cm" svg:viewBox="0 0 2541 1271" draw:points="0,1271 0,0 2541,0 2541,1271">
              <text:p/>
            </draw:polygon>
          </draw:g>
          <draw:frame draw:style-name="gr31" draw:text-style-name="P2" draw:layer="layout" svg:width="2.54cm" svg:height="1.27cm" svg:x="5.398cm" svg:y="7.779cm">
            <draw:text-box>
              <text:p text:style-name="P13"><text:span text:style-name="T3">Sight</text:span></text:p>
            </draw:text-box>
          </draw:frame>
        </draw:g>
        <draw:polyline draw:style-name="gr19" draw:text-style-name="P2" draw:layer="layout" svg:width="7.144cm" svg:height="0.953cm" svg:x="6.668cm" svg:y="6.826cm" svg:viewBox="0 0 7145 954" draw:points="7145,0 7145,477 0,477 0,954">
          <text:p/>
        </draw:polyline>
        <draw:g draw:style-name="gr26">
          <draw:g draw:style-name="gr1">
            <draw:polygon draw:style-name="gr30" draw:text-style-name="P18" draw:layer="layout" svg:width="2.54cm" svg:height="1.27cm" svg:x="12.7cm" svg:y="7.779cm" svg:viewBox="0 0 2541 1271" draw:points="0,1271 0,0 2541,0 2541,1271">
              <text:p/>
            </draw:polygon>
            <draw:polygon draw:style-name="gr19" draw:text-style-name="P2" draw:layer="layout" svg:width="2.54cm" svg:height="1.27cm" svg:x="12.7cm" svg:y="7.779cm" svg:viewBox="0 0 2541 1271" draw:points="0,1271 0,0 2541,0 2541,1271">
              <text:p/>
            </draw:polygon>
          </draw:g>
          <draw:frame draw:style-name="gr31" draw:text-style-name="P2" draw:layer="layout" svg:width="2.54cm" svg:height="1.27cm" svg:x="12.7cm" svg:y="7.779cm">
            <draw:text-box>
              <text:p text:style-name="P13"><text:span text:style-name="T3">Tactile</text:span></text:p>
            </draw:text-box>
          </draw:frame>
        </draw:g>
        <draw:polyline draw:style-name="gr19" draw:text-style-name="P2" draw:layer="layout" svg:width="0.159cm" svg:height="0.953cm" svg:x="13.811cm" svg:y="6.826cm" svg:viewBox="0 0 160 954" draw:points="0,0 0,477 160,477 160,954">
          <text:p/>
        </draw:polyline>
        <draw:g draw:style-name="gr26">
          <draw:g draw:style-name="gr1">
            <draw:polygon draw:style-name="gr30" draw:text-style-name="P18" draw:layer="layout" svg:width="2.54cm" svg:height="1.27cm" svg:x="16.193cm" svg:y="7.779cm" svg:viewBox="0 0 2541 1271" draw:points="0,1271 0,0 2541,0 2541,1271">
              <text:p/>
            </draw:polygon>
            <draw:polygon draw:style-name="gr19" draw:text-style-name="P2" draw:layer="layout" svg:width="2.54cm" svg:height="1.27cm" svg:x="16.193cm" svg:y="7.779cm" svg:viewBox="0 0 2541 1271" draw:points="0,1271 0,0 2541,0 2541,1271">
              <text:p/>
            </draw:polygon>
          </draw:g>
          <draw:frame draw:style-name="gr31" draw:text-style-name="P2" draw:layer="layout" svg:width="2.54cm" svg:height="1.27cm" svg:x="16.193cm" svg:y="7.779cm">
            <draw:text-box>
              <text:p text:style-name="P13"><text:span text:style-name="T3">Audio</text:span></text:p>
            </draw:text-box>
          </draw:frame>
        </draw:g>
        <draw:polyline draw:style-name="gr19" draw:text-style-name="P2" draw:layer="layout" svg:width="3.651cm" svg:height="0.953cm" svg:x="13.811cm" svg:y="6.826cm" svg:viewBox="0 0 3652 954" draw:points="0,0 0,477 3652,477 3652,954">
          <text:p/>
        </draw:polyline>
        <draw:g draw:style-name="gr26">
          <draw:g draw:style-name="gr1">
            <draw:polygon draw:style-name="gr30" draw:text-style-name="P18" draw:layer="layout" svg:width="2.54cm" svg:height="1.27cm" svg:x="19.685cm" svg:y="7.779cm" svg:viewBox="0 0 2541 1271" draw:points="0,1271 0,0 2541,0 2541,1271">
              <text:p/>
            </draw:polygon>
            <draw:polygon draw:style-name="gr19" draw:text-style-name="P2" draw:layer="layout" svg:width="2.54cm" svg:height="1.27cm" svg:x="19.685cm" svg:y="7.779cm" svg:viewBox="0 0 2541 1271" draw:points="0,1271 0,0 2541,0 2541,1271">
              <text:p/>
            </draw:polygon>
          </draw:g>
          <draw:frame draw:style-name="gr31" draw:text-style-name="P2" draw:layer="layout" svg:width="2.54cm" svg:height="1.27cm" svg:x="19.685cm" svg:y="7.779cm">
            <draw:text-box>
              <text:p text:style-name="P13"><text:span text:style-name="T3">Electronic</text:span></text:p>
            </draw:text-box>
          </draw:frame>
        </draw:g>
        <draw:polyline draw:style-name="gr19" draw:text-style-name="P2" draw:layer="layout" svg:width="7.144cm" svg:height="0.953cm" svg:x="13.811cm" svg:y="6.826cm" svg:viewBox="0 0 7145 954" draw:points="0,0 0,477 7145,477 7145,954">
          <text:p/>
        </draw:polyline>
        <draw:g draw:style-name="gr26">
          <draw:g draw:style-name="gr1">
            <draw:polygon draw:style-name="gr30" draw:text-style-name="P18" draw:layer="layout" svg:width="2.54cm" svg:height="1.27cm" svg:x="19.685cm" svg:y="10.001cm" svg:viewBox="0 0 2541 1271" draw:points="0,1271 0,0 2541,0 2541,1271">
              <text:p/>
            </draw:polygon>
            <draw:polygon draw:style-name="gr19" draw:text-style-name="P2" draw:layer="layout" svg:width="2.54cm" svg:height="1.27cm" svg:x="19.685cm" svg:y="10.001cm" svg:viewBox="0 0 2541 1271" draw:points="0,1271 0,0 2541,0 2541,1271">
              <text:p/>
            </draw:polygon>
          </draw:g>
          <draw:frame draw:style-name="gr31" draw:text-style-name="P2" draw:layer="layout" svg:width="2.54cm" svg:height="1.27cm" svg:x="19.685cm" svg:y="10.001cm">
            <draw:text-box>
              <text:p text:style-name="P13"><text:span text:style-name="T3">Communications</text:span></text:p>
            </draw:text-box>
          </draw:frame>
        </draw:g>
        <draw:g draw:style-name="gr26">
          <draw:g draw:style-name="gr1">
            <draw:polygon draw:style-name="gr30" draw:text-style-name="P18" draw:layer="layout" svg:width="2.54cm" svg:height="1.27cm" svg:x="19.685cm" svg:y="11.906cm" svg:viewBox="0 0 2541 1271" draw:points="0,1271 0,0 2541,0 2541,1271">
              <text:p/>
            </draw:polygon>
            <draw:polygon draw:style-name="gr19" draw:text-style-name="P2" draw:layer="layout" svg:width="2.54cm" svg:height="1.27cm" svg:x="19.685cm" svg:y="11.906cm" svg:viewBox="0 0 2541 1271" draw:points="0,1271 0,0 2541,0 2541,1271">
              <text:p/>
            </draw:polygon>
          </draw:g>
          <draw:frame draw:style-name="gr31" draw:text-style-name="P2" draw:layer="layout" svg:width="2.54cm" svg:height="1.27cm" svg:x="19.685cm" svg:y="11.906cm">
            <draw:text-box>
              <text:p text:style-name="P13"><text:span text:style-name="T3">Electric / Electrical Power Input</text:span></text:p>
            </draw:text-box>
          </draw:frame>
        </draw:g>
        <draw:polyline draw:style-name="gr19" draw:text-style-name="P2" draw:layer="layout" svg:width="1.746cm" svg:height="1.588cm" svg:x="19.209cm" svg:y="9.049cm" svg:viewBox="0 0 1747 1589" draw:points="1747,0 1747,477 0,477 0,1589 476,1589">
          <text:p/>
        </draw:polyline>
        <draw:polyline draw:style-name="gr19" draw:text-style-name="P2" draw:layer="layout" svg:width="1.746cm" svg:height="3.493cm" svg:x="19.209cm" svg:y="9.049cm" svg:viewBox="0 0 1747 3494" draw:points="1747,0 1747,476 0,476 0,3494 476,3494">
          <text:p/>
        </draw:polyline>
        <draw:g draw:style-name="gr26">
          <draw:g draw:style-name="gr1">
            <draw:polygon draw:style-name="gr30" draw:text-style-name="P18" draw:layer="layout" svg:width="2.54cm" svg:height="1.27cm" svg:x="12.7cm" svg:y="10.001cm" svg:viewBox="0 0 2541 1271" draw:points="0,1271 0,0 2541,0 2541,1271">
              <text:p/>
            </draw:polygon>
            <draw:polygon draw:style-name="gr19" draw:text-style-name="P2" draw:layer="layout" svg:width="2.54cm" svg:height="1.27cm" svg:x="12.7cm" svg:y="10.001cm" svg:viewBox="0 0 2541 1271" draw:points="0,1271 0,0 2541,0 2541,1271">
              <text:p/>
            </draw:polygon>
          </draw:g>
          <draw:frame draw:style-name="gr31" draw:text-style-name="P2" draw:layer="layout" svg:width="2.54cm" svg:height="1.27cm" svg:x="12.7cm" svg:y="10.001cm">
            <draw:text-box>
              <text:p text:style-name="P13"><text:span text:style-name="T3">Thermal</text:span></text:p>
            </draw:text-box>
          </draw:frame>
        </draw:g>
        <draw:polyline draw:style-name="gr19" draw:text-style-name="P2" draw:layer="layout" svg:width="1.746cm" svg:height="1.588cm" svg:x="12.224cm" svg:y="9.049cm" svg:viewBox="0 0 1747 1589" draw:points="1747,0 1747,477 0,477 0,1589 476,1589">
          <text:p/>
        </draw:polyline>
        <draw:g draw:style-name="gr26">
          <draw:g draw:style-name="gr1">
            <draw:polygon draw:style-name="gr30" draw:text-style-name="P18" draw:layer="layout" svg:width="2.54cm" svg:height="1.27cm" svg:x="12.7cm" svg:y="11.906cm" svg:viewBox="0 0 2541 1271" draw:points="0,1271 0,0 2541,0 2541,1271">
              <text:p/>
            </draw:polygon>
            <draw:polygon draw:style-name="gr19" draw:text-style-name="P2" draw:layer="layout" svg:width="2.54cm" svg:height="1.27cm" svg:x="12.7cm" svg:y="11.906cm" svg:viewBox="0 0 2541 1271" draw:points="0,1271 0,0 2541,0 2541,1271">
              <text:p/>
            </draw:polygon>
          </draw:g>
          <draw:frame draw:style-name="gr31" draw:text-style-name="P2" draw:layer="layout" svg:width="2.54cm" svg:height="1.27cm" svg:x="12.7cm" svg:y="11.906cm">
            <draw:text-box>
              <text:p text:style-name="P13"><text:span text:style-name="T3">Texture</text:span></text:p>
            </draw:text-box>
          </draw:frame>
        </draw:g>
        <draw:polyline draw:style-name="gr19" draw:text-style-name="P2" draw:layer="layout" svg:width="1.746cm" svg:height="3.493cm" svg:x="12.224cm" svg:y="9.049cm" svg:viewBox="0 0 1747 3494" draw:points="1747,0 1747,476 0,476 0,3494 476,3494">
          <text:p/>
        </draw:polyline>
        <draw:g draw:style-name="gr1">
          <draw:polygon draw:style-name="gr30" draw:text-style-name="P18" draw:layer="layout" svg:width="0cm" svg:height="0.126cm" svg:x="5.842cm" svg:y="18.669cm" svg:viewBox="0 0 0 127" draw:points="0,127 0,0">
            <text:p/>
          </draw:polygon>
          <draw:polygon draw:style-name="gr19" draw:text-style-name="P2" draw:layer="layout" svg:width="0cm" svg:height="0.126cm" svg:x="5.842cm" svg:y="18.669cm" svg:viewBox="0 0 0 127" draw:points="0,127 0,0">
            <text:p/>
          </draw:polygon>
        </draw:g>
        <draw:line draw:style-name="gr19" draw:text-style-name="P2" draw:layer="layout" svg:x1="4.005cm" svg:y1="4.082cm" svg:x2="26.776cm" svg:y2="4.082cm">
          <text:p/>
        </draw:line>
        <draw:g draw:style-name="gr1">
          <draw:polygon draw:style-name="gr20" draw:text-style-name="P12" draw:layer="layout" svg:width="0.152cm" svg:height="0.152cm" svg:x="26.699cm" svg:y="4.082cm" svg:viewBox="0 0 153 153" draw:points="153,0 77,153 0,0">
            <text:p/>
          </draw:polygon>
          <draw:polygon draw:style-name="gr19" draw:text-style-name="P2" draw:layer="layout" svg:width="0.152cm" svg:height="0.152cm" svg:x="26.699cm" svg:y="4.082cm" svg:viewBox="0 0 153 153" draw:points="153,0 77,153 0,0">
            <text:p/>
          </draw:polygon>
        </draw:g>
        <draw:frame draw:style-name="gr21" draw:text-style-name="P2" draw:layer="layout" svg:width="5.083cm" svg:height="0.851cm" svg:x="21.693cm" svg:y="2.943cm">
          <draw:text-box>
            <text:p text:style-name="P13"><text:span text:style-name="T1">03/27/2007</text:span></text:p>
          </draw:text-box>
        </draw:frame>
        <draw:g draw:style-name="gr1">
          <draw:polygon draw:style-name="gr20" draw:text-style-name="P12" draw:layer="layout" svg:width="1.787cm" svg:height="3.038cm" svg:x="1.849cm" svg:y="1.407cm" svg:viewBox="0 0 1788 3039" draw:points="0,2467 1788,0 1572,3039">
            <text:p/>
          </draw:polygon>
          <draw:polygon draw:style-name="gr19" draw:text-style-name="P2" draw:layer="layout" svg:width="1.787cm" svg:height="3.038cm" svg:x="1.849cm" svg:y="1.407cm" svg:viewBox="0 0 1788 3039" draw:points="0,2467 1788,0 1572,3039">
            <text:p/>
          </draw:polygon>
        </draw:g>
        <draw:polygon draw:style-name="gr22" draw:text-style-name="P2" draw:layer="layout" svg:width="2.4cm" svg:height="3.429cm" svg:x="2.382cm" svg:y="1.763cm" svg:viewBox="0 0 2401 3430" draw:points="0,0 2401,1714 0,3430">
          <text:p/>
        </draw:polygon>
        <draw:polygon draw:style-name="gr23" draw:text-style-name="P2" draw:layer="layout" svg:width="1.223cm" svg:height="0.873cm" svg:x="3.276cm" svg:y="2.168cm" svg:viewBox="0 0 1224 874" draw:points="0,874 611,0 1224,874">
          <text:p/>
        </draw:polygon>
        <draw:polygon draw:style-name="gr19" draw:text-style-name="P2" draw:layer="layout" svg:width="1.897cm" svg:height="1.909cm" svg:x="1.37cm" svg:y="2.604cm" svg:viewBox="0 0 1898 1910" draw:points="0,1910 641,0 1898,1576">
          <text:p/>
        </draw:polygon>
        <draw:line draw:style-name="gr19" draw:text-style-name="P2" draw:layer="layout" svg:x1="1.376cm" svg:y1="19.639cm" svg:x2="26.776cm" svg:y2="19.639cm">
          <text:p/>
        </draw:line>
        <draw:g draw:style-name="gr1">
          <draw:polygon draw:style-name="gr20" draw:text-style-name="P12" draw:layer="layout" svg:width="0.152cm" svg:height="0.152cm" svg:x="26.699cm" svg:y="19.639cm" svg:viewBox="0 0 153 153" draw:points="0,0 153,0 77,153">
            <text:p/>
          </draw:polygon>
          <draw:polygon draw:style-name="gr19" draw:text-style-name="P2" draw:layer="layout" svg:width="0.152cm" svg:height="0.152cm" svg:x="26.699cm" svg:y="19.639cm" svg:viewBox="0 0 153 153" draw:points="0,0 153,0 77,153">
            <text:p/>
          </draw:polygon>
        </draw:g>
        <draw:frame draw:style-name="gr24" draw:text-style-name="P2" draw:layer="layout" svg:width="1.295cm" svg:height="0.569cm" svg:x="25.164cm" svg:y="19.926cm">
          <draw:text-box>
            <text:p text:style-name="P13"><text:span text:style-name="T1">page 6</text:span></text:p>
          </draw:text-box>
        </draw:frame>
        <draw:frame draw:style-name="gr34" draw:text-style-name="P2" draw:layer="layout" svg:width="10.771cm" svg:height="2.547cm" svg:x="4.976cm" svg:y="1.841cm">
          <draw:text-box>
            <text:p text:style-name="P13"><text:span text:style-name="T2">Information &amp; Imagination</text:span></text:p>
          </draw:text-box>
        </draw:frame>
        <draw:g draw:style-name="gr26">
          <draw:g draw:style-name="gr1">
            <draw:polygon draw:style-name="gr27" draw:text-style-name="P17" draw:layer="layout" svg:width="7.62cm" svg:height="0.381cm" svg:x="1.397cm" svg:y="19.177cm" svg:viewBox="0 0 7621 382" draw:points="0,382 7621,382 7621,0 0,0">
              <text:p/>
            </draw:polygon>
            <draw:polygon draw:style-name="gr19" draw:text-style-name="P2" draw:layer="layout" svg:width="7.62cm" svg:height="0.381cm" svg:x="1.397cm" svg:y="19.177cm" svg:viewBox="0 0 7621 382" draw:points="0,382 7621,382 7621,0 0,0">
              <text:p/>
            </draw:polygon>
          </draw:g>
          <draw:frame draw:style-name="gr28" draw:text-style-name="P2" draw:layer="layout" svg:width="7.62cm" svg:height="0.382cm" svg:x="1.397cm" svg:y="19.176cm">
            <draw:text-box>
              <text:p text:style-name="P13"><text:span text:style-name="T3">CYPMECH 001</text:span></text:p>
            </draw:text-box>
          </draw:frame>
        </draw:g>
        <draw:g draw:style-name="gr26">
          <draw:g draw:style-name="gr1">
            <draw:polygon draw:style-name="gr30" draw:text-style-name="P18" draw:layer="layout" svg:width="2.54cm" svg:height="1.27cm" svg:x="6.032cm" svg:y="11.906cm" svg:viewBox="0 0 2541 1271" draw:points="0,1271 0,0 2541,0 2541,1271">
              <text:p/>
            </draw:polygon>
            <draw:polygon draw:style-name="gr19" draw:text-style-name="P2" draw:layer="layout" svg:width="2.54cm" svg:height="1.27cm" svg:x="6.032cm" svg:y="11.906cm" svg:viewBox="0 0 2541 1271" draw:points="0,1271 0,0 2541,0 2541,1271">
              <text:p/>
            </draw:polygon>
          </draw:g>
          <draw:frame draw:style-name="gr31" draw:text-style-name="P2" draw:layer="layout" svg:width="2.54cm" svg:height="1.27cm" svg:x="6.032cm" svg:y="11.906cm">
            <draw:text-box>
              <text:p text:style-name="P13"><text:span text:style-name="T3">Human Eye Sight</text:span></text:p>
            </draw:text-box>
          </draw:frame>
        </draw:g>
        <draw:polyline draw:style-name="gr19" draw:text-style-name="P2" draw:layer="layout" svg:width="1.111cm" svg:height="3.493cm" svg:x="5.556cm" svg:y="9.049cm" svg:viewBox="0 0 1112 3494" draw:points="1112,0 1112,476 0,476 0,3494 476,3494">
          <text:p/>
        </draw:polyline>
        <draw:g draw:style-name="gr26">
          <draw:g draw:style-name="gr1">
            <draw:polygon draw:style-name="gr30" draw:text-style-name="P18" draw:layer="layout" svg:width="2.54cm" svg:height="1.27cm" svg:x="6.032cm" svg:y="13.811cm" svg:viewBox="0 0 2541 1271" draw:points="0,1271 0,0 2541,0 2541,1271">
              <text:p/>
            </draw:polygon>
            <draw:polygon draw:style-name="gr19" draw:text-style-name="P2" draw:layer="layout" svg:width="2.54cm" svg:height="1.27cm" svg:x="6.032cm" svg:y="13.811cm" svg:viewBox="0 0 2541 1271" draw:points="0,1271 0,0 2541,0 2541,1271">
              <text:p/>
            </draw:polygon>
          </draw:g>
          <draw:frame draw:style-name="gr31" draw:text-style-name="P2" draw:layer="layout" svg:width="2.54cm" svg:height="1.27cm" svg:x="6.032cm" svg:y="13.811cm">
            <draw:text-box>
              <text:p text:style-name="P13"><text:span text:style-name="T3">IR</text:span></text:p>
            </draw:text-box>
          </draw:frame>
        </draw:g>
        <draw:polyline draw:style-name="gr19" draw:text-style-name="P2" draw:layer="layout" svg:width="1.111cm" svg:height="5.398cm" svg:x="5.556cm" svg:y="9.049cm" svg:viewBox="0 0 1112 5399" draw:points="1112,0 1112,476 0,476 0,5399 476,5399">
          <text:p/>
        </draw:polyline>
        <draw:g draw:style-name="gr26">
          <draw:g draw:style-name="gr1">
            <draw:polygon draw:style-name="gr30" draw:text-style-name="P18" draw:layer="layout" svg:width="2.54cm" svg:height="1.27cm" svg:x="6.032cm" svg:y="10.001cm" svg:viewBox="0 0 2541 1271" draw:points="0,1271 0,0 2541,0 2541,1271">
              <text:p/>
            </draw:polygon>
            <draw:polygon draw:style-name="gr19" draw:text-style-name="P2" draw:layer="layout" svg:width="2.54cm" svg:height="1.27cm" svg:x="6.032cm" svg:y="10.001cm" svg:viewBox="0 0 2541 1271" draw:points="0,1271 0,0 2541,0 2541,1271">
              <text:p/>
            </draw:polygon>
          </draw:g>
          <draw:frame draw:style-name="gr31" draw:text-style-name="P2" draw:layer="layout" svg:width="2.54cm" svg:height="1.27cm" svg:x="6.032cm" svg:y="10.001cm">
            <draw:text-box>
              <text:p text:style-name="P13"><text:span text:style-name="T3">Radar </text:span></text:p>
            </draw:text-box>
          </draw:frame>
        </draw:g>
        <draw:polyline draw:style-name="gr19" draw:text-style-name="P2" draw:layer="layout" svg:width="1.111cm" svg:height="1.588cm" svg:x="5.556cm" svg:y="9.049cm" svg:viewBox="0 0 1112 1589" draw:points="1112,0 1112,477 0,477 0,1589 476,1589">
          <text:p/>
        </draw:polyline>
      </draw:page>
      <draw:page draw:name="VBackground" draw:style-name="dp1" draw:master-page-name="PM6">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page>
      <draw:page draw:name="VBackground2" draw:style-name="dp1" draw:master-page-name="PM7">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page>
      <draw:page draw:name="VBackground3" draw:style-name="dp1" draw:master-page-name="PM8">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page>
      <draw:page draw:name="VBackground4" draw:style-name="dp1" draw:master-page-name="PM9">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page>
      <draw:page draw:name="VBackground5" draw:style-name="dp1" draw:master-page-name="PM10">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page>
      <draw:page draw:name="VBackground6" draw:style-name="dp1" draw:master-page-name="PM11">
        <draw:g draw:style-name="gr1">
          <draw:polygon draw:style-name="gr2" draw:text-style-name="P1" draw:layer="layout" svg:width="27.94cm" svg:height="10.795cm" svg:x="0cm" svg:y="10.795cm" svg:viewBox="0 0 27941 10796" draw:points="0,0 0,10796 27941,10796 27941,0">
            <text:p/>
          </draw:polygon>
          <draw:polygon draw:style-name="gr3" draw:text-style-name="P2" draw:layer="layout" svg:width="27.94cm" svg:height="10.795cm" svg:x="0cm" svg:y="10.795cm" svg:viewBox="0 0 27941 10796" draw:points="0,0 0,10796 27941,10796 27941,0">
            <text:p/>
          </draw:polygon>
        </draw:g>
        <draw:g draw:style-name="gr1">
          <draw:polygon draw:style-name="gr4" draw:text-style-name="P3" draw:layer="layout" svg:width="27.94cm" svg:height="10.795cm" svg:x="0cm" svg:y="0cm" svg:viewBox="0 0 27941 10796" draw:points="0,10796 27941,10796 27941,0 0,0">
            <text:p/>
          </draw:polygon>
          <draw:polygon draw:style-name="gr3" draw:text-style-name="P2" draw:layer="layout" svg:width="27.94cm" svg:height="10.795cm" svg:x="0cm" svg:y="0cm" svg:viewBox="0 0 27941 10796" draw:points="0,10796 27941,10796 27941,0 0,0">
            <text:p/>
          </draw:polygon>
        </draw:g>
        <draw:path draw:style-name="gr5" draw:text-style-name="P2" draw:layer="layout" svg:width="19.722cm" svg:height="16.184cm" svg:x="0cm" svg:y="5.364cm" svg:viewBox="0 0 19723 16185" svg:d="M0 482c428-129 862-232 1300-309 2668-470 5458 23 8089 1430 2631 1408 5010 3680 6898 6588 1536 2366 2708 5092 3436 7994">
          <text:p/>
        </draw:path>
        <draw:polygon draw:style-name="gr6" draw:text-style-name="P4" draw:layer="layout" svg:width="0.411cm" svg:height="21.59cm" svg:x="25.886cm" svg:y="0cm" svg:viewBox="0 0 412 21591" draw:points="0,21591 412,21591 412,0 0,0">
          <text:p/>
        </draw:polygon>
        <draw:line draw:style-name="gr3" draw:text-style-name="P2" draw:layer="layout" svg:x1="0cm" svg:y1="9.324cm" svg:x2="27.941cm" svg:y2="0cm">
          <text:p/>
        </draw:line>
        <draw:line draw:style-name="gr3" draw:text-style-name="P2" draw:layer="layout" svg:x1="27.941cm" svg:y1="0cm" svg:x2="7.19cm" svg:y2="21.591cm">
          <text:p/>
        </draw:line>
        <draw:polyline draw:style-name="gr3" draw:text-style-name="P2" draw:layer="layout" svg:width="23.831cm" svg:height="12.758cm" svg:x="0cm" svg:y="8.832cm" svg:viewBox="0 0 23832 12759" draw:points="0,0 23832,0 23832,12759">
          <text:p/>
        </draw:polyline>
        <draw:polyline draw:style-name="gr3" draw:text-style-name="P2" draw:layer="layout" svg:width="24.242cm" svg:height="2.453cm" svg:x="0cm" svg:y="9.078cm" svg:viewBox="0 0 24243 2454" draw:points="0,0 24243,0 24243,2454 0,2454">
          <text:p/>
        </draw:polyline>
        <draw:line draw:style-name="gr5" draw:text-style-name="P2" draw:layer="layout" svg:x1="25.475cm" svg:y1="21.59cm" svg:x2="25.475cm" svg:y2="0cm">
          <text:p/>
        </draw:line>
        <draw:g draw:style-name="gr1">
          <draw:polygon draw:style-name="gr7" draw:text-style-name="P5" draw:layer="layout" svg:width="1.494cm" svg:height="0.892cm" svg:x="23.025cm" svg:y="2.836cm" svg:viewBox="0 0 1495 893" draw:points="1495,893 1495,0 0,0 0,893">
            <text:p/>
          </draw:polygon>
          <draw:polygon draw:style-name="gr8" draw:text-style-name="P2" draw:layer="layout" svg:width="1.494cm" svg:height="0.892cm" svg:x="23.025cm" svg:y="2.836cm" svg:viewBox="0 0 1495 893" draw:points="1495,893 1495,0 0,0 0,893">
            <text:p/>
          </draw:polygon>
        </draw:g>
        <draw:g draw:style-name="gr1">
          <draw:polygon draw:style-name="gr9" draw:text-style-name="P6" draw:layer="layout" svg:width="0.822cm" svg:height="2.392cm" svg:x="25.004cm" svg:y="1.32cm" svg:viewBox="0 0 823 2393" draw:points="823,2393 823,0 0,0 0,2393">
            <text:p/>
          </draw:polygon>
          <draw:polygon draw:style-name="gr8" draw:text-style-name="P2" draw:layer="layout" svg:width="0.822cm" svg:height="2.392cm" svg:x="25.004cm" svg:y="1.32cm" svg:viewBox="0 0 823 2393" draw:points="823,2393 823,0 0,0 0,2393">
            <text:p/>
          </draw:polygon>
        </draw:g>
        <draw:polyline draw:style-name="gr8" draw:text-style-name="P2" draw:layer="layout" svg:width="5.598cm" svg:height="3.649cm" svg:x="21.666cm" svg:y="0.768cm" svg:viewBox="0 0 5599 3650" draw:points="5599,3619 3339,3619 3339,3374 51,3374 51,3251 3339,3251 3544,3251 3544,3497 4572,3497 4572,61 5599,61 5599,0 4469,0 4469,3466 3596,3466 3596,3221 0,3221 0,3405 3288,3405 3288,3650 5599,3650">
          <text:p/>
        </draw:polyline>
        <draw:polyline draw:style-name="gr8" draw:text-style-name="P2" draw:layer="layout" svg:width="2.337cm" svg:height="3.021cm" svg:x="24.927cm" svg:y="0.737cm" svg:viewBox="0 0 2338 3022" draw:points="2338,0 1156,0 1156,3022 0,3022 0,567 951,567 951,2976 1002,2976 1002,536 51,536 51,506 1002,506 1002,475 51,475">
          <text:p/>
        </draw:polyline>
        <draw:polyline draw:style-name="gr8" draw:text-style-name="P2" draw:layer="layout" svg:width="2.388cm" svg:height="3.113cm" svg:x="24.876cm" svg:y="0.676cm" svg:viewBox="0 0 2389 3114" draw:points="1207,3114 0,3114 0,475 1129,475 1129,30 2389,30 2389,0 1129,0">
          <text:p/>
        </draw:polyline>
        <draw:g draw:style-name="gr1">
          <draw:path draw:style-name="gr10" draw:text-style-name="P7"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path draw:style-name="gr11" draw:text-style-name="P2" draw:layer="layout" svg:width="3.185cm" svg:height="0.491cm" svg:x="21.512cm" svg:y="4.264cm" svg:viewBox="0 0 3186 492" svg:d="M1 492v-492 1c0 11 3 21 7 31 5 9 12 17 20 22s17 8 26 8 17-3 25-9c8-5 14-13 19-23 4-9 6-19 6-30v492c0-3 1-6 0-10 0-10-2-21-7-31-5-9-11-17-19-22s-17-8-27-8c-9 0-18 3-25 9-8 6-15 13-19 23-5 10-7 20-7 31 1 3 1 5 1 8zM617 492v-492 1c0 11 3 21 8 31 4 9 11 17 19 22s17 8 26 8 18-3 25-9c8-5 14-13 19-23 4-9 6-19 6-30v492c1-3 1-6 1-10-1-10-3-21-8-31-5-9-11-17-19-22s-17-8-26-8c-10 0-18 3-26 9s-15 13-19 23-7 20-6 31c0 3 0 5 0 8zM463 492v-492 1c0 11 3 21 8 31 4 9 11 17 19 22s17 8 26 8 18-3 25-9c8-5 14-13 19-23 4-9 6-19 6-30v492c1-3 1-6 1-10-1-10-3-21-8-31-5-9-11-17-19-22s-17-8-26-8c-10 0-19 3-26 9-8 6-15 13-19 23s-7 20-6 31c0 3 0 5 0 8zM309 492v-492c0 11 3 22 7 31 5 9 12 17 20 22 7 5 16 8 25 8 9-1 18-3 26-9 7-6 14-13 18-23 4-9 6-19 6-29v492c1-4 1-9 1-13 0-11-3-22-7-31-5-9-12-17-20-23-8-5-17-8-26-7-9 0-18 3-26 8-8 6-14 14-19 24-4 9-6 20-6 31 0 4 0 7 1 11zM155 492v-492 1c0 11 3 21 7 31 5 9 12 17 20 22s17 8 26 8 18-3 25-9c8-5 14-13 19-23 4-9 6-19 6-30v492c0-3 1-6 1-10-1-10-3-21-8-31-5-9-11-17-19-22s-17-8-27-8c-9 0-18 3-25 9-8 6-15 13-19 23s-7 20-6 31c0 3 0 5 0 8zM771 492v-492 1c0 11 3 21 8 31 4 9 11 17 19 22s17 8 26 8 18-3 25-9c8-5 15-13 19-23 4-9 6-19 6-30v492c1-3 1-6 1-10 0-10-3-21-8-31-5-9-11-17-19-22s-17-8-26-8-18 3-26 9-14 13-19 23c-4 10-6 20-6 31 0 3 0 5 0 8zM1387 492v-492 1c1 11 3 22 8 31 4 9 11 17 19 22s17 8 26 8c8 0 17-3 25-9 8-5 14-13 18-23 4-9 7-19 6-30v492c1-4 1-9 1-13 0-11-2-22-7-31s-12-17-20-23c-8-5-17-8-26-7-9 0-18 3-26 8-7 6-14 14-18 24-5 9-7 20-7 31 0 4 1 7 1 11zM1233 492v-492 1c1 11 3 21 8 31 5 9 11 17 19 22s17 8 26 8 18-3 26-9c7-5 14-13 18-23 4-9 6-19 6-30v492c1-3 1-6 1-10 0-10-3-21-8-31-4-9-11-17-19-22s-17-8-26-8-18 3-26 9-14 13-19 23c-4 10-6 20-6 31 0 3 0 5 0 8zM1078 492v-492 1c1 11 3 21 8 31 4 9 11 17 19 22s17 8 26 8 18-3 26-9c7-5 14-13 18-23 4-9 6-19 6-30v492c1-3 1-6 1-10 0-10-3-21-8-31-4-9-11-17-19-22s-17-8-26-8-18 3-26 9-14 13-19 23c-4 10-6 20-6 31 0 3 0 5 0 8zM925 492v-492 1c0 11 3 21 8 31 4 9 11 17 19 22s17 8 26 8 18-3 25-9c8-5 15-13 19-23 4-9 6-19 6-30v492c1-3 1-6 1-10 0-10-3-21-8-31-4-9-11-17-19-22s-17-8-26-8-18 3-26 9-14 13-19 23c-4 10-6 20-6 31 0 3 0 5 0 8zM2313 492v-492 1c0 11 2 21 7 31 5 9 11 17 19 22s17 8 26 8 18-3 26-9c8-5 14-13 18-23 5-9 7-19 7-30v492c0-3 0-6 0-10 0-10-3-21-7-31-5-9-12-17-20-22s-17-8-26-8-18 3-26 9-14 13-18 23c-5 10-7 20-7 31 0 3 0 5 1 8zM2929 492v-492 1c0 11 3 21 7 31 5 9 12 17 20 22s16 8 26 8c9 0 17-3 25-9 8-5 14-13 19-23 4-9 6-19 6-30v492c0-3 0-6 0-10 0-10-2-21-7-31-5-9-12-17-20-22s-17-8-26-8-18 3-26 9c-7 6-14 13-18 23-5 10-7 20-7 31 0 3 1 5 1 8zM2776 492v-492 1c0 11 3 22 7 31 5 9 11 17 19 22s17 8 26 8 18-3 25-9c8-5 14-13 19-23 4-9 6-19 6-30v492c1-4 1-9 1-13 0-11-3-22-8-31-4-9-11-17-19-23-8-5-17-8-26-7-9 0-18 3-26 8-8 6-14 14-19 24-4 9-6 20-6 31 0 4 0 7 1 11zM2621 492v-492 1c0 11 3 21 7 31 5 9 12 17 20 22 7 5 16 8 25 8s18-3 26-9c8-5 14-13 18-23 5-9 7-19 7-30v492c0-3 0-6 0-10 0-10-2-21-7-31-5-9-12-17-20-22s-17-8-26-8-18 3-26 9c-7 6-14 13-18 23-5 10-7 20-7 31 0 3 1 5 1 8zM2467 492v-492 1c0 11 3 21 7 31 5 9 12 17 19 22 8 5 17 8 26 8s18-3 26-9c8-5 14-13 18-23 5-9 7-19 7-30v492c0-3 0-6 0-10 0-10-3-21-7-31-5-9-12-17-20-22s-17-8-26-8-18 3-26 9-14 13-18 23c-5 10-7 20-7 31 0 3 0 5 1 8zM1542 492v-492 1c1 11 3 22 8 31 4 9 11 17 19 22s17 8 26 8 17-3 25-9c8-5 14-13 18-23 4-9 7-19 7-30v492c0-4 1-9 0-13 0-11-2-22-7-31s-11-17-19-23c-8-5-18-8-27-7-9 0-18 3-26 8-7 6-14 14-18 24-5 9-7 20-7 31 0 4 1 7 1 11zM2158 492v-492 1c0 11 2 21 7 31 5 9 11 17 19 22s17 8 26 8 18-3 26-9c8-5 14-13 18-23 5-9 7-19 7-30v492c0-3 0-6 0-10 0-10-3-21-7-31-5-9-12-17-20-22s-17-8-26-8-18 3-26 9-14 13-18 23c-5 10-7 20-7 31 0 3 0 5 1 8zM2005 492v-492 1c0 11 2 21 7 31 5 9 11 17 19 22s17 8 26 8 18-3 26-9c8-5 14-13 18-23 5-9 7-19 7-30v492c0-3 0-6 0-10 0-10-3-21-7-31-5-9-12-17-20-22s-17-8-26-8-18 3-26 9-14 13-18 23c-5 10-7 20-7 31 0 3 0 5 1 8zM1850 492v-492 1c0 11 2 21 7 31 5 9 11 17 19 22s17 8 26 8 18-3 26-9c8-5 14-13 18-23 4-9 7-19 7-30v492c0-3 0-6 0-10 0-10-3-21-7-31-5-9-12-17-20-22s-17-8-26-8-18 3-26 9-14 13-19 23c-4 10-6 20-6 31 0 3 0 5 1 8zM1697 492v-492 1c0 11 2 22 7 31s11 17 19 22 17 8 26 8 17-3 25-9c8-5 14-13 18-23 5-9 7-19 7-30v492c0-4 1-9 0-13 0-11-2-22-7-31s-11-17-19-23c-8-5-17-8-27-7-9 0-18 3-25 8-8 6-15 14-19 24-4 9-7 20-7 31 1 4 1 7 2 11zM3083 492v-492 1c0 11 3 21 7 31 5 9 12 17 20 22s17 8 26 8 17-3 25-9c8-5 14-13 19-23 4-9 6-19 6-30v492c0-3 1-6 0-10 0-10-2-21-7-31-5-9-11-17-19-22s-18-8-27-8-18 3-26 9c-7 6-14 13-18 23-5 10-7 20-7 31 0 3 1 5 1 8z">
            <text:p/>
          </draw:path>
        </draw:g>
        <draw:path draw:style-name="gr8" draw:text-style-name="P2" draw:layer="layout" svg:width="1.644cm" svg:height="0.981cm" svg:x="22.95cm" svg:y="2.792cm" svg:viewBox="0 0 1645 982" svg:d="M74 893h-74M74 848h-74M74 803h-74M74 759h-74M74 714h-74M74 670h-74M74 625h-74M74 356h-74M74 401h-74M74 446h-74M74 490h-74M74 536h-74M74 580h-74M74 312h-74M74 89h-74M74 133h-74M74 178h-74M74 223h-74M74 267h-74M1645 893h-75M1645 848h-75M1645 803h-75M1645 759h-75M1645 714h-75M1645 670h-75M1645 625h-75M1645 356h-75M1645 401h-75M1645 446h-75M1645 490h-75M1645 536h-75M1645 580h-75M1645 312h-75M1645 89h-75M1645 133h-75M1645 178h-75M1645 223h-75M1645 267h-75M149 44v-44M224 44v-44M298 44v-44M373 44v-44M449 44v-44M523 44v-44M598 44v-44M1046 44v-44M972 44v-44M897 44v-44M822 44v-44M748 44v-44M673 44v-44M1121 44v-44M1496 44v-44M1421 44v-44M1346 44v-44M1271 44l1-44M1196 44v-44M149 982v-45M224 982v-45M298 982v-45M373 982v-45M449 982v-45M523 982v-45M598 982v-45M1046 982v-45M972 982v-45M897 982v-45M822 982v-45M748 982v-45M673 982v-45M1121 982v-45M1496 982v-45M1421 982v-45M1346 982v-45M1272 982v-45M1196 982v-45">
          <text:p/>
        </draw:path>
        <draw:g draw:style-name="gr1">
          <draw:path draw:style-name="gr12" draw:text-style-name="P8"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path draw:style-name="gr3" draw:text-style-name="P2" draw:layer="layout" svg:width="0.514cm" svg:height="2.147cm" svg:x="25.158cm" svg:y="1.442cm" svg:viewBox="0 0 515 2148" svg:d="M206 2148v-122h-206v122zM206 1780v-122h-206v122zM515 1964v-122h-206v122zM206 1964v-122h-206v122zM515 2148v-122h-206v122zM515 1780v-122h-206v122zM206 490v-122h-206v122zM206 122v-122h-206v122zM515 306v-122h-206v122zM206 306v-122h-206v122zM515 490v-122h-206v122zM515 122v-122h-206v122zM206 1043v-122h-206v122zM206 675v-122h-206v122zM515 859v-122h-206v122zM206 859v-122h-206v122zM515 1043v-122h-206v122zM515 675v-122h-206v122zM206 1595v-122h-206v122zM206 1227v-122h-206v122zM515 1411v-122h-206v122zM206 1411v-122h-206v122zM515 1595v-122h-206v122zM515 1227v-122h-206v122z">
            <text:p/>
          </draw:path>
        </draw:g>
        <draw:path draw:style-name="gr13" draw:text-style-name="P2" draw:layer="layout" svg:width="0.616cm" svg:height="4.661cm" svg:x="26.648cm" svg:y="1.136cm" svg:viewBox="0 0 617 4662" svg:d="M0 2914h617M0 3159h617M0 3405h617M0 3650h617M0 1932h617M0 2177h617M0 2423h617M0 2669h617M0 981h617M0 1226h617M0 1472h617M0 1717h617M0 0h617M0 245h617M0 490h617M0 736h617M0 3926h617M0 4171h617M0 4417h617M0 4662h617">
          <text:p/>
        </draw:path>
        <draw:path draw:style-name="gr11" draw:text-style-name="P2" draw:layer="layout" svg:width="1.181cm" svg:height="0.146cm" svg:x="23.977cm" svg:y="6.073cm" svg:viewBox="0 0 1182 147" svg:d="M0 0v147M51 0v147M102 0v147M154 0v147M205 0v147M256 0v147M308 0v147M359 0v147M410 0v147M462 0v147M720 0v147M771 0v147M822 0v147M874 0v147M925 0v147M976 0v147M1028 0v147M1079 0v147M1130 0v147M1182 0v147">
          <text:p/>
        </draw:path>
        <draw:polygon draw:style-name="gr14" draw:text-style-name="P9" draw:layer="layout" svg:width="27.94cm" svg:height="2.944cm" svg:x="0cm" svg:y="18.646cm" svg:viewBox="0 0 27941 2945" draw:points="0,2945 27941,2945 27941,0 0,0">
          <text:p/>
        </draw:polygon>
        <draw:line draw:style-name="gr3" draw:text-style-name="P2" draw:layer="layout" svg:x1="25.969cm" svg:y1="20.211cm" svg:x2="26.13cm" svg:y2="20.211cm">
          <text:p/>
        </draw:line>
        <draw:line draw:style-name="gr3" draw:text-style-name="P2" draw:layer="layout" svg:x1="25.969cm" svg:y1="20.054cm" svg:x2="26.13cm" svg:y2="20.054cm">
          <text:p/>
        </draw:line>
        <draw:line draw:style-name="gr3" draw:text-style-name="P2" draw:layer="layout" svg:x1="25.969cm" svg:y1="19.898cm" svg:x2="26.13cm" svg:y2="19.898cm">
          <text:p/>
        </draw:line>
        <draw:line draw:style-name="gr3" draw:text-style-name="P2" draw:layer="layout" svg:x1="25.969cm" svg:y1="17.864cm" svg:x2="26.13cm" svg:y2="17.864cm">
          <text:p/>
        </draw:line>
        <draw:line draw:style-name="gr3" draw:text-style-name="P2" draw:layer="layout" svg:x1="25.969cm" svg:y1="17.708cm" svg:x2="26.13cm" svg:y2="17.708cm">
          <text:p/>
        </draw:line>
        <draw:line draw:style-name="gr3" draw:text-style-name="P2" draw:layer="layout" svg:x1="25.969cm" svg:y1="17.552cm" svg:x2="26.13cm" svg:y2="17.552cm">
          <text:p/>
        </draw:line>
        <draw:line draw:style-name="gr3" draw:text-style-name="P2" draw:layer="layout" svg:x1="25.969cm" svg:y1="18.333cm" svg:x2="26.13cm" svg:y2="18.333cm">
          <text:p/>
        </draw:line>
        <draw:line draw:style-name="gr3" draw:text-style-name="P2" draw:layer="layout" svg:x1="25.969cm" svg:y1="18.177cm" svg:x2="26.13cm" svg:y2="18.177cm">
          <text:p/>
        </draw:line>
        <draw:line draw:style-name="gr3" draw:text-style-name="P2" draw:layer="layout" svg:x1="25.969cm" svg:y1="18.021cm" svg:x2="26.13cm" svg:y2="18.021cm">
          <text:p/>
        </draw:line>
        <draw:line draw:style-name="gr3" draw:text-style-name="P2" draw:layer="layout" svg:x1="25.969cm" svg:y1="18.803cm" svg:x2="26.13cm" svg:y2="18.803cm">
          <text:p/>
        </draw:line>
        <draw:line draw:style-name="gr3" draw:text-style-name="P2" draw:layer="layout" svg:x1="25.969cm" svg:y1="18.646cm" svg:x2="26.13cm" svg:y2="18.646cm">
          <text:p/>
        </draw:line>
        <draw:line draw:style-name="gr3" draw:text-style-name="P2" draw:layer="layout" svg:x1="25.969cm" svg:y1="18.49cm" svg:x2="26.13cm" svg:y2="18.49cm">
          <text:p/>
        </draw:line>
        <draw:line draw:style-name="gr3" draw:text-style-name="P2" draw:layer="layout" svg:x1="25.969cm" svg:y1="19.272cm" svg:x2="26.13cm" svg:y2="19.272cm">
          <text:p/>
        </draw:line>
        <draw:line draw:style-name="gr3" draw:text-style-name="P2" draw:layer="layout" svg:x1="25.969cm" svg:y1="19.116cm" svg:x2="26.13cm" svg:y2="19.116cm">
          <text:p/>
        </draw:line>
        <draw:line draw:style-name="gr3" draw:text-style-name="P2" draw:layer="layout" svg:x1="25.969cm" svg:y1="18.959cm" svg:x2="26.13cm" svg:y2="18.959cm">
          <text:p/>
        </draw:line>
        <draw:line draw:style-name="gr3" draw:text-style-name="P2" draw:layer="layout" svg:x1="25.969cm" svg:y1="19.741cm" svg:x2="26.13cm" svg:y2="19.741cm">
          <text:p/>
        </draw:line>
        <draw:line draw:style-name="gr3" draw:text-style-name="P2" draw:layer="layout" svg:x1="25.969cm" svg:y1="19.585cm" svg:x2="26.13cm" svg:y2="19.585cm">
          <text:p/>
        </draw:line>
        <draw:line draw:style-name="gr3" draw:text-style-name="P2" draw:layer="layout" svg:x1="25.969cm" svg:y1="19.428cm" svg:x2="26.13cm" svg:y2="19.428cm">
          <text:p/>
        </draw:line>
        <draw:line draw:style-name="gr3" draw:text-style-name="P2" draw:layer="layout" svg:x1="25.322cm" svg:y1="20.211cm" svg:x2="25.483cm" svg:y2="20.211cm">
          <text:p/>
        </draw:line>
        <draw:line draw:style-name="gr3" draw:text-style-name="P2" draw:layer="layout" svg:x1="25.322cm" svg:y1="20.054cm" svg:x2="25.483cm" svg:y2="20.054cm">
          <text:p/>
        </draw:line>
        <draw:line draw:style-name="gr3" draw:text-style-name="P2" draw:layer="layout" svg:x1="25.322cm" svg:y1="19.898cm" svg:x2="25.483cm" svg:y2="19.898cm">
          <text:p/>
        </draw:line>
        <draw:line draw:style-name="gr3" draw:text-style-name="P2" draw:layer="layout" svg:x1="25.322cm" svg:y1="17.864cm" svg:x2="25.483cm" svg:y2="17.864cm">
          <text:p/>
        </draw:line>
        <draw:line draw:style-name="gr3" draw:text-style-name="P2" draw:layer="layout" svg:x1="25.322cm" svg:y1="17.708cm" svg:x2="25.483cm" svg:y2="17.708cm">
          <text:p/>
        </draw:line>
        <draw:line draw:style-name="gr3" draw:text-style-name="P2" draw:layer="layout" svg:x1="25.322cm" svg:y1="17.552cm" svg:x2="25.483cm" svg:y2="17.552cm">
          <text:p/>
        </draw:line>
        <draw:line draw:style-name="gr3" draw:text-style-name="P2" draw:layer="layout" svg:x1="25.322cm" svg:y1="18.333cm" svg:x2="25.483cm" svg:y2="18.333cm">
          <text:p/>
        </draw:line>
        <draw:line draw:style-name="gr3" draw:text-style-name="P2" draw:layer="layout" svg:x1="25.322cm" svg:y1="18.177cm" svg:x2="25.483cm" svg:y2="18.177cm">
          <text:p/>
        </draw:line>
        <draw:line draw:style-name="gr3" draw:text-style-name="P2" draw:layer="layout" svg:x1="25.322cm" svg:y1="18.021cm" svg:x2="25.483cm" svg:y2="18.021cm">
          <text:p/>
        </draw:line>
        <draw:line draw:style-name="gr3" draw:text-style-name="P2" draw:layer="layout" svg:x1="25.322cm" svg:y1="18.803cm" svg:x2="25.483cm" svg:y2="18.803cm">
          <text:p/>
        </draw:line>
        <draw:line draw:style-name="gr3" draw:text-style-name="P2" draw:layer="layout" svg:x1="25.322cm" svg:y1="18.646cm" svg:x2="25.483cm" svg:y2="18.646cm">
          <text:p/>
        </draw:line>
        <draw:line draw:style-name="gr3" draw:text-style-name="P2" draw:layer="layout" svg:x1="25.322cm" svg:y1="18.49cm" svg:x2="25.483cm" svg:y2="18.49cm">
          <text:p/>
        </draw:line>
        <draw:line draw:style-name="gr3" draw:text-style-name="P2" draw:layer="layout" svg:x1="25.322cm" svg:y1="19.272cm" svg:x2="25.483cm" svg:y2="19.272cm">
          <text:p/>
        </draw:line>
        <draw:line draw:style-name="gr3" draw:text-style-name="P2" draw:layer="layout" svg:x1="25.322cm" svg:y1="19.116cm" svg:x2="25.483cm" svg:y2="19.116cm">
          <text:p/>
        </draw:line>
        <draw:line draw:style-name="gr3" draw:text-style-name="P2" draw:layer="layout" svg:x1="25.322cm" svg:y1="18.959cm" svg:x2="25.483cm" svg:y2="18.959cm">
          <text:p/>
        </draw:line>
        <draw:line draw:style-name="gr3" draw:text-style-name="P2" draw:layer="layout" svg:x1="25.322cm" svg:y1="19.741cm" svg:x2="25.483cm" svg:y2="19.741cm">
          <text:p/>
        </draw:line>
        <draw:line draw:style-name="gr3" draw:text-style-name="P2" draw:layer="layout" svg:x1="25.322cm" svg:y1="19.585cm" svg:x2="25.483cm" svg:y2="19.585cm">
          <text:p/>
        </draw:line>
        <draw:line draw:style-name="gr3" draw:text-style-name="P2" draw:layer="layout" svg:x1="25.322cm" svg:y1="19.428cm" svg:x2="25.483cm" svg:y2="19.428cm">
          <text:p/>
        </draw:line>
        <draw:g draw:style-name="gr1">
          <draw:polygon draw:style-name="gr15" draw:text-style-name="P10" draw:layer="layout" svg:width="3.157cm" svg:height="0.626cm" svg:x="19.695cm" svg:y="18.959cm" svg:viewBox="0 0 3158 627" draw:points="0,0 3158,0 3158,627 0,627">
            <text:p/>
          </draw:polygon>
          <draw:polygon draw:style-name="gr3" draw:text-style-name="P2" draw:layer="layout" svg:width="3.157cm" svg:height="0.626cm" svg:x="19.695cm" svg:y="18.959cm" svg:viewBox="0 0 3158 627" draw:points="0,0 3158,0 3158,627 0,627">
            <text:p/>
          </draw:polygon>
        </draw:g>
        <draw:polyline draw:style-name="gr3" draw:text-style-name="P2" draw:layer="layout" svg:width="7.933cm" svg:height="3.441cm" svg:x="19.331cm" svg:y="16.77cm" svg:viewBox="0 0 7934 3442" draw:points="7934,3442 6962,3442 6962,312 6962,0 5829,0 5829,3208 5262,3208 5262,2582 3642,2582 3642,3051 80,3051 80,1956 3561,1956 3561,1877 0,1877 0,3130 3723,3130 3723,2660 5181,2660 5181,3286 5829,3286">
          <text:p/>
        </draw:polyline>
        <draw:polyline draw:style-name="gr3" draw:text-style-name="P2" draw:layer="layout" svg:width="1.74cm" svg:height="3.402cm" svg:x="25.524cm" svg:y="14.697cm" svg:viewBox="0 0 1741 3403" draw:points="1741,3403 1012,3403 1012,39 1053,39 1053,3364 1741,3364 1741,3169 1255,3169 1255,39 1296,39 1296,3130 1741,3130 1741,3090 1336,3090 1336,0 0,0 0,234 40,234 40,39 972,39">
          <text:p/>
        </draw:polyline>
        <draw:path draw:style-name="gr16" draw:text-style-name="P2" draw:layer="layout" svg:width="12.628cm" svg:height="0.469cm" svg:x="11.722cm" svg:y="20.445cm" svg:viewBox="0 0 12629 470" svg:d="M8784 470v-470M8460 470v-470M8136 470v-470M7812 470v-470M10079 470v-470M9755 470v-470M9431 470v-470M9108 470v-470M11334 470v-470M11010 470v-470M10686 470v-470M10362 470v-470M12629 470v-470M12305 470v-470M11981 470v-470M11657 470v-470M7448 470v-470M7124 470v-470M6800 470v-470M6477 470v-470M2307 470v-470M1983 470v-470M1659 470v-470M1335 470v-470M3602 470v-470M3278 470v-470M2954 470v-470M2630 470v-470M4857 470v-470M4533 470v-470M4209 470v-470M3885 470v-470M6152 470v-470M5828 470v-470M5504 470v-470M5180 470v-470M971 470v-470M647 470v-470M323 470v-470M0 470v-470">
          <text:p/>
        </draw:path>
        <draw:g draw:style-name="gr1">
          <draw:path draw:style-name="gr12" draw:text-style-name="P8"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path draw:style-name="gr17" draw:text-style-name="P2" draw:layer="layout" svg:width="0.486cm" svg:height="0.782cm" svg:x="18.602cm" svg:y="18.92cm" svg:viewBox="0 0 487 783" svg:d="M80 704v-626h326v626zM406 704h81zM406 665h81zM406 626h81zM406 587h81zM406 548h81zM406 509h81zM406 470h81zM406 431h81zM406 392h81zM406 351h81zM406 312h81zM406 273h81zM406 234h81zM406 195h81zM406 156h81zM406 117h81zM406 78h81zM0 704h80zM0 665h80zM0 626h80zM0 587h80zM0 548h80zM0 509h80zM0 470h80zM0 431h80zM0 392h80zM0 351h80zM0 312h80zM0 273h80zM0 234h80zM0 195h80zM0 156h80zM0 117h80zM0 78h80zM406 78v-78zM366 78v-78zM324 78v-78zM284 78v-78zM243 78v-78zM203 78v-78zM162 78v-78zM121 78v-78zM80 78v-78zM406 783v-79zM366 783v-79zM324 783v-79zM284 783v-79zM243 783v-79zM203 783v-79zM162 783v-79zM121 783v-79zM80 783v-79z">
            <text:p/>
          </draw:path>
        </draw:g>
        <draw:g draw:style-name="gr1">
          <draw:path draw:style-name="gr7" draw:text-style-name="P5" draw:layer="layout" svg:width="0.486cm" svg:height="3.441cm" svg:x="25.483cm" svg:y="17.082cm" svg:viewBox="0 0 487 3442" svg:d="M324 0v156zM487 0v156zM406 0v156zM324 3286v156zM406 3286v156zM487 3286v156zM243 0v156zM0 0v156zM162 0v156zM80 0v156zM243 3286v156zM0 3286v156zM162 3286v156zM80 3286v156zM0 156h487v3130h-487z">
            <text:p/>
          </draw:path>
          <draw:path draw:style-name="gr3" draw:text-style-name="P2" draw:layer="layout" svg:width="0.809cm" svg:height="3.441cm" svg:x="25.322cm" svg:y="17.082cm" svg:viewBox="0 0 810 3442" svg:d="M486 0v156zM648 0v156zM567 0v156zM486 3286v156zM567 3286v156zM648 3286v156zM0 312h161M648 312h162M404 0v156zM161 0v156zM323 0v156zM242 0v156zM404 3286v156zM161 3286v156zM323 3286v156zM242 3286v156zM161 156h487v3130h-487z">
            <text:p/>
          </draw:path>
        </draw:g>
        <draw:path draw:style-name="gr3" draw:text-style-name="P2" draw:layer="layout" svg:width="0.192cm" svg:height="0.899cm" svg:x="27.062cm" svg:y="19.155cm" svg:viewBox="0 0 193 900" svg:d="M193 900h-193M193 861h-193M193 822h-193M193 783h-193M193 743h-193M193 704h-193M193 665h-193M193 626h-193M193 587h-193M193 548h-193M193 351h-193M193 312h-193M193 273h-193M193 234h-193M193 195h-193M193 156h-193M193 117h-193M193 78h-193M193 39h-193M193 0h-193">
          <text:p/>
        </draw:path>
        <draw:g draw:style-name="gr1">
          <draw:path draw:style-name="gr10" draw:text-style-name="P7"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path draw:style-name="gr3" draw:text-style-name="P2" draw:layer="layout" svg:width="0.835cm" svg:height="1.344cm" svg:x="25.552cm" svg:y="15.01cm" svg:viewBox="0 0 836 1345" svg:d="M139 1210v-1076h558v1076zM697 1210h139zM697 1143h139zM697 1076h139zM697 1009h139zM697 941h139zM697 874h139zM697 807h139zM697 740h139zM697 673h139zM697 604h139zM697 537h139zM697 470h139zM697 403h139zM697 336h139zM697 268h139zM697 201h139zM697 134h139zM0 1210h139zM0 1143h139zM0 1076h139zM0 1009h139zM0 941h139zM0 874h139zM0 807h139zM0 740h139zM0 673h139zM0 604h139zM0 537h139zM0 470h139zM0 403h139zM0 336h139zM0 268h139zM0 201h139zM0 134h139zM697 134v-134zM628 134v-134zM557 134v-134zM487 134v-134zM418 134v-134zM348 134v-134zM279 134v-134zM208 134v-134zM139 134v-134zM697 1345v-135zM628 1345v-135zM557 1345v-135zM487 1345v-135zM418 1345v-135zM348 1345v-135zM279 1345v-135zM208 1345v-135zM139 1345v-135z">
            <text:p/>
          </draw:path>
        </draw:g>
        <draw:g draw:style-name="gr1">
          <draw:path draw:style-name="gr12" draw:text-style-name="P8"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path draw:style-name="gr3" draw:text-style-name="P2" draw:layer="layout" svg:width="2.833cm" svg:height="0.391cm" svg:x="19.857cm" svg:y="19.076cm" svg:viewBox="0 0 2834 392" svg:d="M0 235h161v157h-161zM485 235h162v157h-162zM242 0h162v156h-162zM242 235h162v157h-162zM0 0h161v156h-161zM485 0h162v156h-162zM2186 235h162v157h-162zM2672 235h162v157h-162zM2429 0h162v156h-162zM2429 235h162v157h-162zM2186 0h162v156h-162zM2672 0h162v156h-162zM1458 235h162v157h-162zM1943 235h162v157h-162zM1700 0h162v156h-162zM1700 235h162v157h-162zM1458 0h162v156h-162zM1943 0h162v156h-162zM728 235h162v157h-162zM1214 235h162v157h-162zM971 0h162v156h-162zM971 235h162v157h-162zM728 0h162v156h-162zM1214 0h162v156h-162z">
            <text:p/>
          </draw:path>
        </draw:g>
        <draw:polygon draw:style-name="gr6" draw:text-style-name="P4" draw:layer="layout" svg:width="0.645cm" svg:height="0.711cm" svg:x="2.612cm" svg:y="14.868cm" svg:viewBox="0 0 646 712" draw:points="0,712 646,712 646,0 0,0">
          <text:p/>
        </draw:polygon>
        <draw:polygon draw:style-name="gr18" draw:text-style-name="P11" draw:layer="layout" svg:width="0.242cm" svg:height="0.267cm" svg:x="2.814cm" svg:y="15.09cm" svg:viewBox="0 0 243 268" draw:points="0,268 243,268 243,0 0,0">
          <text:p/>
        </draw:polygon>
        <draw:g draw:style-name="gr1">
          <draw:path draw:style-name="gr9" draw:text-style-name="P6"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path draw:style-name="gr3" draw:text-style-name="P2" draw:layer="layout" svg:width="0.484cm" svg:height="0.889cm" svg:x="5.598cm" svg:y="14.868cm" svg:viewBox="0 0 485 890" svg:d="M80 0v88zM121 0v88zM161 0v88zM201 0v88zM242 0v88zM283 0v88zM323 0v88zM364 0v88zM404 0v88zM80 801v89zM121 801v89zM161 801v89zM201 801v89zM242 801v89zM283 801v89zM323 801v89zM364 801v89zM404 801v89zM0 801h80zM0 756h80zM0 712h80zM0 667h80zM0 623h80zM0 578h80zM0 534h80zM0 490h80zM0 444h80zM0 400h80zM0 355h80zM0 311h80zM0 266h80zM0 222h80zM0 177h80zM0 133h80zM0 88h80zM404 801h81zM404 756h81zM404 712h81zM404 667h81zM404 623h81zM404 578h81zM404 534h81zM404 490h81zM404 444h81zM404 400h81zM404 355h81zM404 311h81zM404 266h81zM404 222h81zM404 177h81zM404 133h81zM404 88h81zM80 88v713h324v-713z">
            <text:p/>
          </draw:path>
        </draw:g>
        <draw:polyline draw:style-name="gr17" draw:text-style-name="P2" draw:layer="layout" svg:width="3.611cm" svg:height="0.689cm" svg:x="0.676cm" svg:y="15.312cm" svg:viewBox="0 0 3612 690" draw:points="0,690 3330,690 3330,0 3612,0">
          <text:p/>
        </draw:polyline>
        <draw:g draw:style-name="gr1">
          <draw:path draw:style-name="gr10" draw:text-style-name="P7"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path draw:style-name="gr17" draw:text-style-name="P2" draw:layer="layout" svg:width="0.645cm" svg:height="2.757cm" svg:x="1.805cm" svg:y="16.557cm" svg:viewBox="0 0 646 2758" svg:d="M0 1h646c-14 0-28 2-41 6-12 4-22 9-29 16s-11 15-11 23c0 7 4 15 11 22s17 12 29 16c13 4 27 6 41 6h-646c4 0 8 1 12 1 14 0 28-3 41-6 12-4 22-10 29-17s11-15 11-22c0-8-4-16-11-23s-17-13-29-16c-13-4-27-7-41-7-4 0-8 1-12 1zM0 534h646c-14 0-28 2-41 6-12 4-22 10-29 16-7 7-11 15-11 23s4 15 11 22 17 12 29 16c13 4 27 6 41 6h-646c4 1 8 1 12 1 14 0 28-2 41-6 12-4 22-10 29-17s11-14 11-22-4-16-11-23-17-12-29-16c-13-4-27-6-41-6-4 0-8 0-12 0zM0 401h646c-14 0-28 2-41 6-12 4-22 10-29 16-7 7-11 15-11 23 0 7 4 15 11 22s17 12 29 16c13 4 27 6 41 6h-646c4 1 8 1 12 1 14 0 28-2 41-6 12-4 22-10 29-17s11-14 11-22-4-16-11-23-17-12-29-16c-13-4-27-6-41-6-4 0-8 0-12 0zM0 267h646c-14 0-28 2-41 6-12 4-22 10-29 16-7 7-11 15-11 23 0 7 4 15 11 22s17 12 29 16c13 4 27 6 41 6h-646c4 0 8 1 12 1 14 0 28-2 41-6 12-4 22-10 29-17s11-14 11-22-4-16-11-23-17-12-29-16c-13-4-27-6-41-6-4 0-8 0-12 0zM0 134h646c-14 0-28 2-41 6-12 4-22 10-29 16-7 7-11 15-11 23 0 7 4 15 11 22s17 12 29 16c13 4 27 6 41 6h-646c4 0 8 1 12 1 14 0 28-2 41-6 12-4 22-10 29-17s11-15 11-22c0-8-4-16-11-23s-17-12-29-16c-13-4-27-6-41-6-4 0-8 0-12 0zM0 667h646c-14 0-28 2-41 6-12 4-22 10-29 16-7 7-11 15-11 23s4 15 11 22 17 12 29 16c13 4 27 6 41 6h-646c4 1 8 1 12 1 14 0 28-2 41-6 12-4 22-10 29-17s11-14 11-22-4-16-11-23-17-12-29-16c-13-4-27-6-41-6-4 0-8 0-12 0zM0 1200h646c-14 0-28 2-41 6-12 4-22 10-29 17-7 6-11 14-11 22s4 15 11 22 17 13 29 17c13 3 27 5 41 5h-646c4 1 8 1 12 1 14 0 28-2 41-6 12-4 22-10 29-17 7-6 11-14 11-22s-4-16-11-23c-7-6-17-12-29-16-13-4-27-6-41-6-4 0-8 0-12 0zM0 1068h646c-14 0-28 2-40 6s-22 10-29 16c-7 7-11 15-11 22 0 8 4 16 11 22 7 7 17 13 29 17 12 3 26 5 40 5h-646c6 1 11 1 17 1 14 0 28-2 41-6 12-4 22-9 29-16s11-15 11-23c0-7-4-15-11-22s-17-13-29-17c-13-4-27-6-41-6-6 0-11 1-17 1zM0 934h646c-14 0-28 2-40 6s-22 10-29 16c-7 7-11 15-11 22 0 8 4 16 11 22 7 7 17 13 29 16 12 4 26 6 40 6h-646c6 1 11 1 17 1 14 0 28-2 41-6 12-4 22-9 29-16s11-15 11-23-4-15-11-22-17-13-29-17c-13-4-27-6-41-6-6 0-11 1-17 1zM0 801h646c-14 0-28 2-41 6-12 4-22 10-29 17-7 6-11 14-11 22s4 15 11 22 17 12 29 16c13 4 27 6 41 6h-646c4 1 8 1 12 1 14 0 28-2 41-6 12-4 22-10 29-17s11-14 11-22-4-16-11-23-17-12-29-16c-13-4-27-6-41-6-4 0-8 0-12 0zM0 2003h646c-14 0-28 2-41 6-12 4-22 9-29 16s-11 14-11 22 4 16 11 23c7 6 17 12 29 16 13 4 27 6 41 6h-646c4 0 8 0 12 0 14 0 28-2 41-6 12-4 22-9 29-16s11-15 11-23-4-15-11-22-17-13-29-17c-13-4-27-6-41-6-4 0-8 0-12 1zM0 2536h646c-14 0-28 2-41 6-12 4-22 9-29 16s-11 15-11 22c0 8 4 16 11 23 7 6 17 12 29 16 13 4 27 6 41 6h-646c4 0 8 0 12 0 14 0 28-2 41-6 12-4 22-9 29-16s11-15 11-23c0-7-4-15-11-22s-17-13-29-17c-13-4-27-6-41-6-4 0-8 1-12 1zM0 2403h646c-14 0-28 2-41 6-12 4-22 9-29 16s-11 15-11 22c0 8 4 16 11 23 7 6 17 12 29 16 13 4 27 6 41 6h-646c4 0 8 0 12 0 14 0 28-2 41-6 12-4 22-9 29-16s11-15 11-23-4-15-11-22-17-13-29-17c-13-4-27-6-41-6-4 0-8 1-12 1zM0 2269h646c-14 0-28 2-41 6-12 4-22 9-29 16s-11 15-11 22c0 8 4 16 11 23 7 6 17 12 29 16 13 4 27 6 41 6h-646c4 0 8 0 12 0 14 0 28-2 41-6 12-4 22-9 29-16s11-15 11-23-4-15-11-22-17-13-29-17c-13-4-27-6-41-6-4 0-8 0-12 1zM0 2136h646c-14 0-28 2-41 6-12 4-22 9-29 16s-11 14-11 22 4 16 11 23c7 6 17 12 29 16 13 4 27 6 41 6h-646c4 0 8 0 12 0 14 0 28-2 41-6 12-4 22-9 29-16s11-15 11-23-4-15-11-22-17-13-29-17c-13-4-27-6-41-6-4 0-8 0-12 1zM0 1335h646c-14 0-28 3-40 6-12 4-22 10-29 16-7 7-11 15-11 22 0 8 4 16 11 23 7 6 17 12 29 16 12 3 26 6 40 6h-646c6 0 11 1 17 1 14 0 28-3 41-7 12-3 22-9 29-16s11-15 11-23c0-7-4-15-11-22s-17-13-29-16c-13-4-27-7-41-7-6 0-11 1-17 1zM0 1868h646c-14 0-28 2-41 6-12 4-22 9-29 16s-11 14-11 22 4 16 11 22c7 7 17 13 29 17 13 4 27 6 41 6h-646c4 0 8 0 12 0 14 0 28-2 41-6 12-4 22-9 29-16s11-15 11-23-4-15-11-22-17-13-29-17c-13-4-27-6-41-6-4 0-8 0-12 1zM0 1736h646c-14 0-28 2-41 6-12 4-22 9-29 16s-11 14-11 22 4 16 11 22c7 7 17 13 29 17 13 4 27 6 41 6h-646c4 0 8 0 12 0 14 0 28-2 41-6 12-4 22-10 29-16 7-7 11-15 11-23s-4-16-11-22c-7-7-17-13-29-17-13-4-27-6-41-6-4 0-8 0-12 1zM0 1602h646c-14 0-28 2-41 6-12 3-22 9-29 16s-11 14-11 22 4 16 11 22c7 7 17 13 29 17 13 4 27 6 41 6h-646c4 0 8 0 12 0 14 0 28-2 41-6 12-4 22-10 29-16 7-7 11-15 11-23s-4-16-11-22c-7-7-17-13-29-17-13-4-27-6-41-6-4 0-8 0-12 1zM0 1469h646c-14 0-28 2-41 5-12 4-22 10-29 17s-11 14-11 22 4 16 11 22c7 7 17 13 29 17 13 4 27 6 41 6h-646c4 0 8 0 12 0 14 0 28-2 41-6 12-4 22-10 29-16 7-7 11-15 11-23s-4-16-11-22c-7-7-17-13-29-17-13-4-27-6-41-6-4 0-8 0-12 1zM0 2669h646c-14 0-28 2-41 6-12 4-22 9-29 16s-11 15-11 22c0 8 4 16 11 23s17 12 29 16c13 4 27 6 41 6h-646c4 0 8 0 12 0 14 0 28-2 41-6 12-3 22-9 29-16s11-15 11-23c0-7-4-15-11-22s-17-13-29-17c-13-3-27-6-41-6-4 0-8 1-12 1z">
            <text:p/>
          </draw:path>
        </draw:g>
        <draw:path draw:style-name="gr12" draw:text-style-name="P8" draw:layer="layout" svg:width="0.847cm" svg:height="0.907cm" svg:x="3.661cm" svg:y="18.862cm" svg:viewBox="0 0 848 908" svg:d="M0 53c1-5 3-11 6-15 5-11 13-20 23-26s20-9 32-9c11 0 22 3 31 9 10 6 18 15 23 26 3 4 5 10 6 15v801c-1 5-3 11-6 15-5 11-13 20-23 26-9 6-20 9-31 9-12 0-22-3-32-9s-18-15-23-26c-3-4-5-10-6-15zM181 57c2-5 4-11 6-15 6-11 14-20 23-26 10-6 21-9 32-9s22 3 31 9c10 6 18 15 23 26 3 4 5 10 6 15v801c-1 5-3 11-6 15-5 11-13 20-23 26-9 6-20 9-31 9s-22-3-32-9c-9-6-17-15-23-26-2-4-4-10-6-15zM363 50c2-5 4-11 6-15 6-11 14-20 23-26 10-6 21-9 32-9s22 3 32 9c9 6 17 15 23 26 2 4 4 10 6 15v801c-2 5-4 11-6 15-6 11-14 20-23 26-10 6-21 9-32 9s-22-3-32-9c-9-6-17-15-23-26-2-4-4-10-6-15zM545 50c1-5 3-11 6-15 5-11 13-20 23-26 9-6 20-9 31-9s22 3 32 9c9 6 17 15 23 26 2 4 4 10 6 15v801c-2 5-4 11-6 15-6 11-14 20-23 26-10 6-21 9-32 9s-22-3-31-9c-10-6-18-15-23-26-3-4-5-10-6-15zM727 53c1-5 3-11 6-15 5-11 13-20 23-26 9-6 20-9 31-9 12 0 22 3 32 9s18 15 23 26c3 4 5 10 6 15v801c-1 5-3 11-6 15-5 11-13 20-23 26s-20 9-32 9c-11 0-22-3-31-9-10-6-18-15-23-26-3-4-5-10-6-15z">
          <text:p/>
        </draw:path>
        <draw:path draw:style-name="gr17" draw:text-style-name="P2" draw:layer="layout" svg:width="4.68cm" svg:height="6.758cm" svg:x="0.676cm" svg:y="14.157cm" svg:viewBox="0 0 4681 6759" svg:d="M0 1779h3228v-712h485v533h807v-1245h161v1424h-968v356h-3068v3557h1938v-1423h1453v1601h323v-711-1068h-162-1776v1423h-1615v-3202h162v3025h1292v-1424h2260v2491h-605v-1780h-687-323v2135h1615v-44h-1554v-1001h868v45h-828v533h828v-155h-767v111h727v-67h-687M0 44h3188l888 645v689h-121M0 0h3228l969 711v711h-322v-711c-250-188-506-366-768-534h-3107v445h2663v889h-807v-800h727v711h-646v-711">
          <text:p/>
        </draw:path>
        <draw:g draw:style-name="gr1">
          <draw:path draw:style-name="gr10" draw:text-style-name="P7"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path draw:style-name="gr3" draw:text-style-name="P2" draw:layer="layout" svg:width="0.588cm" svg:height="0.259cm" svg:x="3.799cm" svg:y="20.521cm" svg:viewBox="0 0 589 260" svg:d="M58 260h472v-260h-472zM530 0h59zM530 32h59zM530 64h59zM530 97h59zM530 129h59zM530 163h59zM530 195h59zM530 227h59zM530 260h59zM0 0h58zM0 32h58zM0 64h58zM0 97h58zM0 129h58zM0 163h58zM0 195h58zM0 227h58zM0 260h58z">
            <text:p/>
          </draw:path>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CD" svg:font-family="LC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5f_0" draw:display-name="Gradient_0" draw:style="linear" draw:start-color="#ffffff" draw:end-color="#efefef" draw:start-intensity="100%" draw:end-intensity="100%" draw:angle="45deg" draw:border="0%">
      <loext:gradient-stop svg:offset="0" loext:color-type="rgb" loext:color-value="#ffffff"/>
      <loext:gradient-stop svg:offset="1" loext:color-type="rgb" loext:color-value="#efefef"/>
    </draw:gradient>
    <draw:gradient draw:name="Gradient_5f_1" draw:display-name="Gradient_1" draw:style="linear" draw:start-color="#ffffff" draw:end-color="#efefef" draw:start-intensity="100%" draw:end-intensity="100%" draw:angle="225deg" draw:border="0%">
      <loext:gradient-stop svg:offset="0" loext:color-type="rgb" loext:color-value="#ffffff"/>
      <loext:gradient-stop svg:offset="1" loext:color-type="rgb" loext:color-value="#efefef"/>
    </draw:gradient>
    <draw:gradient draw:name="Gradient_5f_2" draw:display-name="Gradient_2" draw:style="linear" draw:start-color="#fafafa" draw:end-color="#e6e6e6" draw:start-intensity="100%" draw:end-intensity="100%" draw:angle="0deg" draw:border="0%">
      <loext:gradient-stop svg:offset="0" loext:color-type="rgb" loext:color-value="#fafafa"/>
      <loext:gradient-stop svg:offset="1" loext:color-type="rgb" loext:color-value="#e6e6e6"/>
    </draw:gradient>
    <draw:gradient draw:name="Gradient_5f_3" draw:display-name="Gradient_3" draw:style="rectangular" draw:cx="50%" draw:cy="50%" draw:start-color="#fafafa" draw:end-color="#e6e6e6" draw:start-intensity="100%" draw:end-intensity="100%" draw:angle="0deg" draw:border="0%">
      <loext:gradient-stop svg:offset="0" loext:color-type="rgb" loext:color-value="#fafafa"/>
      <loext:gradient-stop svg:offset="1" loext:color-type="rgb" loext:color-value="#e6e6e6"/>
    </draw:gradient>
    <draw:gradient draw:name="Gradient_5f_4" draw:display-name="Gradient_4" draw:style="linear" draw:start-color="#fafafa" draw:end-color="#e6e6e6" draw:start-intensity="100%" draw:end-intensity="100%" draw:angle="90deg" draw:border="0%">
      <loext:gradient-stop svg:offset="0" loext:color-type="rgb" loext:color-value="#fafafa"/>
      <loext:gradient-stop svg:offset="1" loext:color-type="rgb" loext:color-value="#e6e6e6"/>
    </draw:gradient>
    <draw:gradient draw:name="Gradient_5f_5" draw:display-name="Gradient_5" draw:style="axial" draw:start-color="#e6e6e6" draw:end-color="#fafafa" draw:start-intensity="100%" draw:end-intensity="100%" draw:angle="90deg" draw:border="0%">
      <loext:gradient-stop svg:offset="0" loext:color-type="rgb" loext:color-value="#e6e6e6"/>
      <loext:gradient-stop svg:offset="1" loext:color-type="rgb" loext:color-value="#fafafa"/>
    </draw:gradient>
    <draw:gradient draw:name="Gradient_5f_6" draw:display-name="Gradient_6" draw:style="linear" draw:start-color="#e6e6e6" draw:end-color="#ffffff" draw:start-intensity="100%" draw:end-intensity="100%" draw:angle="270deg" draw:border="0%">
      <loext:gradient-stop svg:offset="0" loext:color-type="rgb" loext:color-value="#e6e6e6"/>
      <loext:gradient-stop svg:offset="1" loext:color-type="rgb" loext:color-value="#ffffff"/>
    </draw:gradient>
    <draw:gradient draw:name="Gradient_5f_7" draw:display-name="Gradient_7" draw:style="linear" draw:start-color="#fafafa" draw:end-color="#e6e6e6" draw:start-intensity="100%" draw:end-intensity="100%" draw:angle="270deg" draw:border="0%">
      <loext:gradient-stop svg:offset="0" loext:color-type="rgb" loext:color-value="#fafafa"/>
      <loext:gradient-stop svg:offset="1" loext:color-type="rgb" loext:color-value="#e6e6e6"/>
    </draw:gradient>
    <draw:gradient draw:name="Gradient_5f_8" draw:display-name="Gradient_8" draw:style="linear" draw:start-color="#fafafa" draw:end-color="#e6e6e6" draw:start-intensity="100%" draw:end-intensity="100%" draw:angle="180deg" draw:border="0%">
      <loext:gradient-stop svg:offset="0" loext:color-type="rgb" loext:color-value="#fafafa"/>
      <loext:gradient-stop svg:offset="1" loext:color-type="rgb" loext:color-value="#e6e6e6"/>
    </draw:gradient>
    <draw:gradient draw:name="Gradient_5f_9" draw:display-name="Gradient_9" draw:style="axial" draw:start-color="#008000" draw:end-color="#00ffff" draw:start-intensity="100%" draw:end-intensity="100%" draw:angle="0deg" draw:border="0%">
      <loext:gradient-stop svg:offset="0" loext:color-type="rgb" loext:color-value="#008000"/>
      <loext:gradient-stop svg:offset="1" loext:color-type="rgb" loext:color-value="#00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5"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6"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7"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9"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6.2.4.2$Windows_X86_64 LibreOffice_project/0229ac93fcf0d7cbc6376066c6f35021cef002dc</meta:generator>
    <dc:date>2026-07-17T01:18:36.514727600</dc:date>
    <meta:editing-duration>PT32M40S</meta:editing-duration>
    <meta:editing-cycles>1</meta:editing-cycles>
    <meta:document-statistic meta:object-count="1647"/>
  </office:meta>
</office:document-meta>
</file>